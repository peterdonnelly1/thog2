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2295*"/>
    </style:style>
    <style:style style:name="Table1.B" style:family="table-column">
      <style:table-column-properties style:rel-column-width="43239*"/>
    </style:style>
    <style:style style:name="Table2" style:family="table">
      <style:table-properties table:align="center" style:rel-width="100%"/>
    </style:style>
    <style:style style:name="Table2.A" style:family="table-column">
      <style:table-column-properties style:rel-column-width="24365*"/>
    </style:style>
    <style:style style:name="Table2.B" style:family="table-column">
      <style:table-column-properties style:rel-column-width="8401*"/>
    </style:style>
    <style:style style:name="Table2.C" style:family="table-column">
      <style:table-column-properties style:rel-column-width="12602*"/>
    </style:style>
    <style:style style:name="Table2.D" style:family="table-column">
      <style:table-column-properties style:rel-column-width="20164*"/>
    </style:style>
  </office:automatic-styles>
  <office:body>
    <office:text>
      <text:p text:style-name="Text_20_body">THOG2</text:p>
      <text:p text:style-name="Text_20_body">Chebyshev Sheet Requirements Specification</text:p>
      <text:p text:style-name="Text_20_body">Version 0.1</text:p>
      <table:table table:name="Table1" table:style-name="Table1">
        <table:table-column table:style-name="Table1.A"/>
        <table:table-column table:style-name="Table1.B"/>
        <table:table-row>
          <table:table-cell table:style-name="TableRowCell" office:value-type="string">
            <text:p text:style-name="Table_20_Contents"><text:span text:style-name="T1">System</text:span></text:p>
          </table:table-cell>
          <table:table-cell table:style-name="TableRowCell" office:value-type="string">
            <text:p text:style-name="Table_20_Contents">thog2 enhancement of nanoGPT</text:p>
          </table:table-cell>
        </table:table-row>
        <table:table-row>
          <table:table-cell table:style-name="TableRowCell" office:value-type="string">
            <text:p text:style-name="Table_20_Contents"><text:span text:style-name="T1">Architecture designation</text:span></text:p>
          </table:table-cell>
          <table:table-cell table:style-name="TableRowCell" office:value-type="string">
            <text:p text:style-name="Table_20_Contents">Chebyshev Sheet</text:p>
          </table:table-cell>
        </table:table-row>
        <table:table-row>
          <table:table-cell table:style-name="TableRowCell" office:value-type="string">
            <text:p text:style-name="Table_20_Contents"><text:span text:style-name="T1">Checkpoint model identifier</text:span></text:p>
          </table:table-cell>
          <table:table-cell table:style-name="TableRowCell" office:value-type="string">
            <text:p text:style-name="Table_20_Contents">thog2_sheet</text:p>
          </table:table-cell>
        </table:table-row>
        <table:table-row>
          <table:table-cell table:style-name="TableRowCell" office:value-type="string">
            <text:p text:style-name="Table_20_Contents"><text:span text:style-name="T1">Status</text:span></text:p>
          </table:table-cell>
          <table:table-cell table:style-name="TableRowCell" office:value-type="string">
            <text:p text:style-name="Table_20_Contents">Draft requirements specification; implementation not commenced</text:p>
          </table:table-cell>
        </table:table-row>
        <table:table-row>
          <table:table-cell table:style-name="TableRowCell" office:value-type="string">
            <text:p text:style-name="Table_20_Contents"><text:span text:style-name="T1">Date</text:span></text:p>
          </table:table-cell>
          <table:table-cell table:style-name="TableRowCell" office:value-type="string">
            <text:p text:style-name="Table_20_Contents">2 July 2026</text:p>
          </table:table-cell>
        </table:table-row>
        <table:table-row>
          <table:table-cell table:style-name="TableRowCell" office:value-type="string">
            <text:p text:style-name="Table_20_Contents"><text:span text:style-name="T1">Planned repository</text:span></text:p>
          </table:table-cell>
          <table:table-cell table:style-name="TableRowCell" office:value-type="string">
            <text:p text:style-name="Table_20_Contents">thog2</text:p>
          </table:table-cell>
        </table:table-row>
        <table:table-row>
          <table:table-cell table:style-name="TableRowCell" office:value-type="string">
            <text:p text:style-name="Table_20_Contents"><text:span text:style-name="T1">Repository baseline</text:span></text:p>
          </table:table-cell>
          <table:table-cell table:style-name="TableRowCell" office:value-type="string">
            <text:p text:style-name="Table_20_Contents">Fresh clone of nanoGPT</text:p>
          </table:table-cell>
        </table:table-row>
        <table:table-row>
          <table:table-cell table:style-name="TableRowCell" office:value-type="string">
            <text:p text:style-name="Table_20_Contents"><text:span text:style-name="T1">Relationship to THOGv1</text:span></text:p>
          </table:table-cell>
          <table:table-cell table:style-name="TableRowCell" office:value-type="string">
            <text:p text:style-name="Table_20_Contents">Independent successor experiment; no implementation dependency</text:p>
          </table:table-cell>
        </table:table-row>
      </table:table>
      <text:p text:style-name="First_20_paragraph">Non-normative note: This document is being authored outside the existing THOG repository so that completion of the Vermeer enhancement is not disturbed. It is intended to be added to the future thog2 repository under normal version control after that repository is created.</text:p>
      <text:h text:style-name="Heading_20_1" text:outline-level="1"><text:bookmark-start text:name="purpose"/>1. Purpose<text:bookmark-end text:name="purpose"/></text:h>
      <text:p text:style-name="First_20_paragraph"><text:span text:style-name="T1">1.1 </text:span>This document specifies a transformer architecture named Chebyshev Sheet for implementation in the planned thog2 project.</text:p>
      <text:p text:style-name="Text_20_body"><text:span text:style-name="T1">1.2 </text:span>Chebyshev Sheet shall replace independently persisted per-layer transformer-block matrices with compact learned bivariate Chebyshev surfaces from which logical layer weights are generated.</text:p>
      <text:p text:style-name="Text_20_body"><text:span text:style-name="T1">1.3 </text:span>The architecture shall test whether a transformer trained from scratch can organise its internal representations so that matrix rows are adequately expressible as smooth functions of logical depth and within-row weight position.</text:p>
      <text:p text:style-name="Text_20_body"><text:span text:style-name="T1">1.4 </text:span>The primary objective shall be substantial reduction of persistent transformer-block parameters while retaining useful next-token prediction quality.</text:p>
      <text:p text:style-name="Text_20_body"><text:span text:style-name="T1">1.5 </text:span>The architecture shall use ordinary next-token cross-entropy as its primary and, in the first implementation, sole model-training objective.</text:p>
      <text:p text:style-name="Text_20_body"><text:span text:style-name="T1">1.6 </text:span>The architecture shall not require a pre-trained dense teacher, dense-weight reconstruction target, knowledge distillation, latent-space mean-squared error, or post-training conversion phase.</text:p>
      <text:p text:style-name="Text_20_body"><text:span text:style-name="T1">1.7 </text:span>Functional implementation acceptance shall be separated from scientific evidence that the architecture is competitive with a dense transformer or THOGv1.</text:p>
      <text:h text:style-name="Heading_20_1" text:outline-level="1"><text:bookmark-start text:name="scope-and-project-independence"/>2. Scope and project independence<text:bookmark-end text:name="scope-and-project-independence"/></text:h>
      <text:p text:style-name="First_20_paragraph"><text:span text:style-name="T1">2.1 </text:span>The implementation target shall be a new Git and GitHub project named thog2.</text:p>
      <text:p text:style-name="Text_20_body"><text:span text:style-name="T1">2.2 </text:span>The initial thog2 codebase shall be a fresh clone of nanoGPT rather than a branch of the existing thog repository.</text:p>
      <text:p text:style-name="Text_20_body"><text:span text:style-name="T1">2.3 </text:span>The existing THOGv1 and Vermeer specifications, implementation, tests, and experimental controls may be used as design references.</text:p>
      <text:p text:style-name="Text_20_body"><text:span text:style-name="T1">2.4 </text:span>thog2 shall not import runtime code from the existing thog repository.</text:p>
      <text:p text:style-name="Text_20_body"><text:span text:style-name="T1">2.5 </text:span>Completion, testing, or merging of Vermeer shall not be a prerequisite for commencing thog2 after the thog2 repository is available.</text:p>
      <text:p text:style-name="Text_20_body"><text:span text:style-name="T1">2.6 </text:span>The dense nanoGPT execution path shall remain present as an internal control and regression baseline.</text:p>
      <text:p text:style-name="Text_20_body"><text:span text:style-name="T1">2.7 </text:span>Where existing nanoGPT source lines are superseded, they shall remain present as commented source in accordance with the project modification convention.</text:p>
      <text:p text:style-name="Text_20_body"><text:span text:style-name="T1">2.8 </text:span>New or replaced nanoGPT source shall use the established THOG source markers exactly as required by the project conventions.</text:p>
      <text:h text:style-name="Heading_20_1" text:outline-level="1"><text:bookmark-start text:name="normative-language-and-terminology"/>3. Normative language and terminology<text:bookmark-end text:name="normative-language-and-terminology"/></text:h>
      <text:p text:style-name="First_20_paragraph"><text:span text:style-name="T1">3.1 </text:span>The word shall denotes a mandatory requirement.</text:p>
      <text:p text:style-name="Text_20_body"><text:span text:style-name="T1">3.2 </text:span>The word should denotes a preferred requirement that may be departed from only for a documented reason.</text:p>
      <text:p text:style-name="Text_20_body"><text:span text:style-name="T1">3.3 </text:span>The word may denotes a permitted option.</text:p>
      <text:p text:style-name="Text_20_body"><text:span text:style-name="T1">3.4 </text:span>Logical layer shall mean an ordered transformer block position in the model depth.</text:p>
      <text:p text:style-name="Text_20_body"><text:span text:style-name="T1">3.5 </text:span>Tensor family shall mean a corresponding transformer-block parameter type repeated at every logical layer, such as the attention input projection weight.</text:p>
      <text:p text:style-name="Text_20_body"><text:span text:style-name="T1">3.6 </text:span>Matrix row shall mean one output-coordinate row of a conventional two-dimensional learned weight matrix.</text:p>
      <text:p text:style-name="Text_20_body"><text:span text:style-name="T1">3.7 </text:span>Depth-row weight sheet shall mean a continuous bivariate function whose vertical coordinate is logical depth, whose horizontal coordinate is within-row weight position, and whose function value is a scalar weight value.</text:p>
      <text:p text:style-name="Text_20_body"><text:span text:style-name="T1">3.8 </text:span>Sheet height shall mean the scalar weight value returned by a depth-row weight sheet at a specified depth and row coordinate.</text:p>
      <text:p text:style-name="Text_20_body"><text:span text:style-name="T1">3.9 </text:span>Depthwise weight trajectory shall mean a vertical slice through a depth-row weight sheet at one fixed within-row position.</text:p>
      <text:p text:style-name="Text_20_body"><text:span text:style-name="T1">3.10 </text:span>Rowwise weight profile shall mean a horizontal slice through a depth-row weight sheet at one fixed logical depth.</text:p>
      <text:p text:style-name="Text_20_body"><text:span text:style-name="T1">3.11 </text:span>Interlayer sample shall mean evaluation of a sheet at a depth coordinate that does not correspond to a trained logical layer.</text:p>
      <text:p text:style-name="Text_20_body"><text:span text:style-name="T1">3.12 </text:span>Interweight sample shall mean evaluation of a sheet at a horizontal coordinate that does not correspond to a trained discrete weight position.</text:p>
      <text:p text:style-name="Text_20_body"><text:span text:style-name="T1">3.13 </text:span>Persistent parameter shall mean a trainable value stored in model state and checkpoints.</text:p>
      <text:p text:style-name="Text_20_body"><text:span text:style-name="T1">3.14 </text:span>Generated weight shall mean an ephemeral scalar or tensor value obtained by evaluating learned sheet coefficients at a logical sample coordinate.</text:p>
      <text:p text:style-name="Text_20_body"><text:span text:style-name="T1">3.15 </text:span>Basis terms shall mean the number of included Chebyshev basis functions. A basis containing P terms has maximum polynomial degree P minus one.</text:p>
      <text:h text:style-name="Heading_20_1" text:outline-level="1"><text:bookmark-start text:name="conceptual-model"/>4. Conceptual model<text:bookmark-end text:name="conceptual-model"/></text:h>
      <text:p text:style-name="First_20_paragraph"><text:span text:style-name="T1">4.1 </text:span>The primary learned transformer-block objects shall be depth-row weight sheets rather than independent logical-layer weight matrices.</text:p>
      <text:p text:style-name="Text_20_body"><text:span text:style-name="T1">4.2 </text:span>The vertical sheet axis shall run through logical layers in their execution order.</text:p>
      <text:p text:style-name="Text_20_body"><text:span text:style-name="T1">4.3 </text:span>The horizontal sheet axis shall run left to right through scalar weight positions within one conventional matrix row.</text:p>
      <text:p text:style-name="Text_20_body"><text:span text:style-name="T1">4.4 </text:span>The value of the sheet at one vertical and horizontal coordinate shall be one scalar weight value.</text:p>
      <text:p text:style-name="Text_20_body"><text:span text:style-name="T1">4.5 </text:span>Holding the horizontal coordinate fixed and moving vertically shall produce one depthwise weight trajectory.</text:p>
      <text:p text:style-name="Text_20_body"><text:span text:style-name="T1">4.6 </text:span>Holding the vertical coordinate fixed and moving horizontally shall produce one rowwise weight profile for one logical layer.</text:p>
      <text:p text:style-name="Text_20_body"><text:span text:style-name="T1">4.7 </text:span>Logical transformer weights shall be treated as samples from the continuous sheet rather than as the primary persistent learned objects.</text:p>
      <text:p text:style-name="Text_20_body"><text:span text:style-name="T1">4.8 </text:span>The first implementation shall train and use only the discrete layer and within-row sample locations required by the configured transformer geometry.</text:p>
      <text:p text:style-name="Text_20_body"><text:span text:style-name="T1">4.9 </text:span>Mathematical continuity between trained sample locations shall not be interpreted as evidence that interlayer or interweight samples have useful model semantics.</text:p>
      <text:p text:style-name="Text_20_body"><text:span text:style-name="T1">4.10 </text:span>Sequence position shall not be a sheet coordinate for transformer-block weight generation.</text:p>
      <text:p text:style-name="Text_20_body"><text:span text:style-name="T1">4.11 </text:span>The same generated matrix shall continue to be applied to every sequence position in the conventional transformer operation.</text:p>
      <text:p text:style-name="Text_20_body"><text:span text:style-name="T1">4.12 </text:span>The architecture shall preserve the conventional common activation representation consumed by the attention, MLP, layer-normalisation, and residual operations of a logical layer.</text:p>
      <text:p text:style-name="Text_20_body"><text:span text:style-name="T1">4.13 </text:span>The architecture may rely on training to organise latent-coordinate usage so that the imposed fixed left-to-right row geometry becomes functionally useful.</text:p>
      <text:p text:style-name="Text_20_body"><text:span text:style-name="T1">4.14 </text:span>The primary scientific question shall be whether the resulting constrained function class is sufficiently expressive and trainable, not whether it reproduces the weights of an independently trained dense model.</text:p>
      <text:h text:style-name="Heading_20_1" text:outline-level="1"><text:bookmark-start text:name="logical-transformer-geometry"/>5. Logical transformer geometry<text:bookmark-end text:name="logical-transformer-geometry"/></text:h>
      <text:p text:style-name="First_20_paragraph"><text:span text:style-name="T1">5.1 </text:span>Let L denote the number of logical transformer layers.</text:p>
      <text:p text:style-name="Text_20_body"><text:span text:style-name="T1">5.2 </text:span>Let d denote the model embedding width, also called d_model or n_embd.</text:p>
      <text:p text:style-name="Text_20_body"><text:span text:style-name="T1">5.3 </text:span>Let R_f and C_f denote respectively the output-row count and within-row width of matrix tensor family f.</text:p>
      <text:p text:style-name="Text_20_body"><text:span text:style-name="T1">5.4 </text:span>The first implementation shall preserve nanoGPT transformer operations, residual paths, attention semantics, MLP semantics, masking, dropout, embeddings, and language-model output semantics except where weight storage and materialisation are explicitly replaced.</text:p>
      <text:p text:style-name="Text_20_body"><text:span text:style-name="T1">5.5 </text:span>For the standard nanoGPT block, the attention input projection matrix shall have R_f equal to 3d and C_f equal to d.</text:p>
      <text:p text:style-name="Text_20_body"><text:span text:style-name="T1">5.6 </text:span>For the standard nanoGPT block, the attention output projection matrix shall have R_f equal to d and C_f equal to d.</text:p>
      <text:p text:style-name="Text_20_body"><text:span text:style-name="T1">5.7 </text:span>For the standard nanoGPT block, the MLP expansion matrix shall have R_f equal to 4d and C_f equal to d.</text:p>
      <text:p text:style-name="Text_20_body"><text:span text:style-name="T1">5.8 </text:span>For the standard nanoGPT block, the MLP contraction matrix shall have R_f equal to d and C_f equal to 4d.</text:p>
      <text:p text:style-name="Text_20_body"><text:span text:style-name="T1">5.9 </text:span>The packed query-key-value implementation may remain packed as one 3d-by-d tensor family.</text:p>
      <text:p text:style-name="Text_20_body"><text:span text:style-name="T1">5.10 </text:span>The implementation shall not require a separate mathematical sheet theory for query, key, value, attention output, MLP expansion, or MLP contraction weights.</text:p>
      <text:p text:style-name="Text_20_body"><text:span text:style-name="T1">5.11 </text:span>Token embeddings, positional embeddings, final layer normalisation, and the tied language-model head may remain conventional persistent parameters because they are not repeated as transformer-block tensor families over logical depth.</text:p>
      <text:h text:style-name="Heading_20_1" text:outline-level="1"><text:bookmark-start text:name="universal-chebyshev-sheet-parameterisation"/>6. Universal Chebyshev sheet parameterisation<text:bookmark-end text:name="universal-chebyshev-sheet-parameterisation"/></text:h>
      <text:p text:style-name="First_20_paragraph"><text:span text:style-name="T1">6.1 </text:span>Every generated matrix tensor family shall use the same tensor-product bivariate Chebyshev parameterisation.</text:p>
      <text:p text:style-name="Text_20_body"><text:span text:style-name="T1">6.2 </text:span>Let P denote the number of depthwise Chebyshev basis terms.</text:p>
      <text:p text:style-name="Text_20_body"><text:span text:style-name="T1">6.3 </text:span>Let Q_f denote the number of rowwise Chebyshev basis terms used for tensor family f.</text:p>
      <text:p text:style-name="Text_20_body"><text:span text:style-name="T1">6.4 </text:span>Let B_depth be the fixed depth basis matrix with shape L by P.</text:p>
      <text:p text:style-name="Text_20_body"><text:span text:style-name="T1">6.5 </text:span>Let B_row_f be the fixed row basis matrix with shape C_f by Q_f.</text:p>
      <text:p text:style-name="Text_20_body"><text:span text:style-name="T1">6.6 </text:span>Let A_f be the learned coefficient tensor for matrix family f with shape R_f by P by Q_f.</text:p>
      <text:p text:style-name="Text_20_body"><text:span text:style-name="T1">6.7 </text:span>For output row r of tensor family f, the complete sampled sheet shall be defined by the matrix product:</text:p>
      <text:p text:style-name="P1">S_f_r = B_depth @ A_f[r, :, :] @ transpose(B_row_f)</text:p>
      <text:p text:style-name="First_20_paragraph"><text:span text:style-name="T1">6.8 </text:span>S_f_r shall have shape L by C_f.</text:p>
      <text:p text:style-name="Text_20_body"><text:span text:style-name="T1">6.9 </text:span>Row r of logical layer l shall be the l-th sampled row of S_f_r.</text:p>
      <text:p text:style-name="P2">W_f[l, r, :] = S_f_r[l, :]</text:p>
      <text:p text:style-name="First_20_paragraph"><text:span text:style-name="T1">6.10 </text:span>Each output row shall have its own learned P-by-Q_f coefficient table.</text:p>
      <text:p text:style-name="Text_20_body"><text:span text:style-name="T1">6.11 </text:span>All output rows of the same width shall use the same fixed basis-generation rule but shall not share their learned coefficient table unless a later separately specified experiment introduces such sharing.</text:p>
      <text:p text:style-name="Text_20_body"><text:span text:style-name="T1">6.12 </text:span>A conventional three-dimensional logical weight collection with shape L by R_f by C_f shall therefore be represented as a stack of R_f independent two-dimensional sheets.</text:p>
      <text:p text:style-name="Text_20_body"><text:span text:style-name="T1">6.13 </text:span>The implementation shall not flatten the output-row and within-row dimensions into one combined mega-row in the first version.</text:p>
      <text:p text:style-name="Text_20_body"><text:span text:style-name="T1">6.14 </text:span>A vector tensor family repeated over depth shall use the same parameterisation with R_f equal to one.</text:p>
      <text:p text:style-name="Text_20_body"><text:span text:style-name="T1">6.15 </text:span>The fixed basis matrices shall not be trainable model parameters.</text:p>
      <text:p text:style-name="Text_20_body"><text:span text:style-name="T1">6.16 </text:span>Generated per-layer dense tensors shall not be persistent model parameters.</text:p>
      <text:h text:style-name="Heading_20_1" text:outline-level="1"><text:bookmark-start text:name="coordinates-and-chebyshev-bases"/>7. Coordinates and Chebyshev bases<text:bookmark-end text:name="coordinates-and-chebyshev-bases"/></text:h>
      <text:p text:style-name="First_20_paragraph"><text:span text:style-name="T1">7.1 </text:span>Each logical layer index shall map deterministically and monotonically to a normalized depth coordinate in the closed interval from -1 to 1.</text:p>
      <text:p text:style-name="Text_20_body"><text:span text:style-name="T1">7.2 </text:span>Each within-row scalar index shall map deterministically and monotonically from left to right to a normalized row coordinate in the closed interval from -1 to 1.</text:p>
      <text:p text:style-name="Text_20_body"><text:span text:style-name="T1">7.3 </text:span>The first implementation shall use Chebyshev polynomials of the first kind for both axes.</text:p>
      <text:p text:style-name="Text_20_body"><text:span text:style-name="T1">7.4 </text:span>The depth basis shall contain terms T_0 through T_(P-1).</text:p>
      <text:p text:style-name="Text_20_body"><text:span text:style-name="T1">7.5 </text:span>The row basis for family f shall contain terms T_0 through T_(Q_f-1).</text:p>
      <text:p text:style-name="Text_20_body"><text:span text:style-name="T1">7.6 </text:span>P shall be at least one and shall not exceed L.</text:p>
      <text:p text:style-name="Text_20_body"><text:span text:style-name="T1">7.7 </text:span>Q_f shall be at least one and shall not exceed C_f.</text:p>
      <text:p text:style-name="Text_20_body"><text:span text:style-name="T1">7.8 </text:span>The discrete basis matrices shall have full column rank for every supported configuration.</text:p>
      <text:p text:style-name="Text_20_body"><text:span text:style-name="T1">7.9 </text:span>The basis construction and any normalization or orthogonalisation shall preserve the discrete span of the selected Chebyshev terms.</text:p>
      <text:p text:style-name="Text_20_body"><text:span text:style-name="T1">7.10 </text:span>The implementation shall use numerically stable basis evaluation suitable for rowwise orders of at least 512 terms.</text:p>
      <text:p text:style-name="Text_20_body"><text:span text:style-name="T1">7.11 </text:span>The same depth basis shall be used by every generated transformer-block tensor family with the same L and P.</text:p>
      <text:p text:style-name="Text_20_body"><text:span text:style-name="T1">7.12 </text:span>The same row basis may be cached and reused by every tensor family having the same C_f and Q_f.</text:p>
      <text:p text:style-name="Text_20_body"><text:span text:style-name="T1">7.13 </text:span>The first implementation shall use fixed row coordinates rather than learned weight addresses, learned permutations, or family-specific coordinate warping.</text:p>
      <text:p text:style-name="Text_20_body"><text:span text:style-name="T1">7.14 </text:span>Any future learned-coordinate variant shall require a separate specification because it changes the architectural hypothesis being tested.</text:p>
      <text:h text:style-name="Heading_20_1" text:outline-level="1"><text:bookmark-start text:name="tensor-family-coverage"/>8. Tensor-family coverage<text:bookmark-end text:name="tensor-family-coverage"/></text:h>
      <text:p text:style-name="First_20_paragraph"><text:span text:style-name="T1">8.1 </text:span>The attention input projection weight shall be generated by Chebyshev sheets.</text:p>
      <text:p text:style-name="Text_20_body"><text:span text:style-name="T1">8.2 </text:span>The attention output projection weight shall be generated by Chebyshev sheets.</text:p>
      <text:p text:style-name="Text_20_body"><text:span text:style-name="T1">8.3 </text:span>The MLP expansion weight shall be generated by Chebyshev sheets.</text:p>
      <text:p text:style-name="Text_20_body"><text:span text:style-name="T1">8.4 </text:span>The MLP contraction weight shall be generated by Chebyshev sheets.</text:p>
      <text:p text:style-name="Text_20_body"><text:span text:style-name="T1">8.5 </text:span>Layer-normalisation scale vectors repeated over depth shall use the universal sheet mechanism with one sheet per vector family unless an implementation-stage measurement justifies retaining them conventionally.</text:p>
      <text:p text:style-name="Text_20_body"><text:span text:style-name="T1">8.6 </text:span>Layer-normalisation bias vectors repeated over depth shall use the universal sheet mechanism when bias is enabled unless an implementation-stage measurement justifies retaining them conventionally.</text:p>
      <text:p text:style-name="Text_20_body"><text:span text:style-name="T1">8.7 </text:span>Linear bias vectors repeated over depth shall use the universal sheet mechanism when bias is enabled unless an implementation-stage measurement justifies retaining them conventionally.</text:p>
      <text:p text:style-name="Text_20_body"><text:span text:style-name="T1">8.8 </text:span>Any exception under 8.5 through 8.7 shall be documented, shall preserve the matrix-sheet experiment unchanged, and shall not be represented as a different sheet geometry.</text:p>
      <text:p text:style-name="Text_20_body"><text:span text:style-name="T1">8.9 </text:span>All supported families shall be generated through one common mathematical and software abstraction parameterised by shape, coefficient state, and initialization policy.</text:p>
      <text:p text:style-name="Text_20_body"><text:span text:style-name="T1">8.10 </text:span>Family-specific learned coefficient tensors shall remain independent because the represented operations have different functions and shapes.</text:p>
      <text:h text:style-name="Heading_20_1" text:outline-level="1"><text:bookmark-start text:name="default-basis-configuration-and-scaling-rule"/>9. Default basis configuration and scaling rule<text:bookmark-end text:name="default-basis-configuration-and-scaling-rule"/></text:h>
      <text:p text:style-name="First_20_paragraph"><text:span text:style-name="T1">9.1 </text:span>The principal target geometry shall use L equal to 144 and d equal to 768.</text:p>
      <text:p text:style-name="Text_20_body"><text:span text:style-name="T1">9.2 </text:span>The principal depth basis shall use P equal to 16 terms.</text:p>
      <text:p text:style-name="Text_20_body"><text:span text:style-name="T1">9.3 </text:span>The principal row basis for a row of width d equal to 768 shall use Q_d equal to 128 terms.</text:p>
      <text:p text:style-name="Text_20_body"><text:span text:style-name="T1">9.4 </text:span>For a row width C_f, the default derived row basis count shall be:</text:p>
      <text:p text:style-name="P3">Q_f = min(C_f, ceil(C_f * Q_d / d))</text:p>
      <text:p text:style-name="First_20_paragraph"><text:span text:style-name="T1">9.5 </text:span>For d equal to 768, Q_d equal to 128, and C_f equal to 3072, the derived Q_f shall be 512.</text:p>
      <text:p text:style-name="Text_20_body"><text:span text:style-name="T1">9.6 </text:span>The principal rowwise configuration therefore represents approximately six discrete within-row positions per rowwise basis term.</text:p>
      <text:p text:style-name="Text_20_body"><text:span text:style-name="T1">9.7 </text:span>The principal depthwise configuration represents nine logical layers per depthwise basis term.</text:p>
      <text:p text:style-name="Text_20_body"><text:span text:style-name="T1">9.8 </text:span>P and Q_d shall be configurable independently.</text:p>
      <text:p text:style-name="Text_20_body"><text:span text:style-name="T1">9.9 </text:span>The implementation shall reject configurations in which a derived Q_f exceeds C_f unless the value is explicitly capped by the rule in 9.4.</text:p>
      <text:p text:style-name="Text_20_body"><text:span text:style-name="T1">9.10 </text:span>The first scientific sweep should include Q_d values 64, 128, and 256 at P equal to 16, giving corresponding 4d row orders 256, 512, and 1024.</text:p>
      <text:p text:style-name="Text_20_body"><text:span text:style-name="T1">9.11 </text:span>The default values in this section shall be treated as initial experimental settings rather than claims of optimality.</text:p>
      <text:h text:style-name="Heading_20_1" text:outline-level="1"><text:bookmark-start text:name="parameter-count-requirements"/>10. Parameter-count requirements<text:bookmark-end text:name="parameter-count-requirements"/></text:h>
      <text:p text:style-name="First_20_paragraph"><text:span text:style-name="T1">10.1 </text:span>For a generated matrix family with R_f rows, depth order P, and row order Q_f, the persistent sheet coefficient count shall be R_f times P times Q_f.</text:p>
      <text:p text:style-name="Text_20_body"><text:span text:style-name="T1">10.2 </text:span>For a generated vector family, the persistent sheet coefficient count shall be P times Q_f.</text:p>
      <text:p text:style-name="Text_20_body"><text:span text:style-name="T1">10.3 </text:span>Fixed basis matrices shall not be included in trainable parameter counts.</text:p>
      <text:p text:style-name="Text_20_body"><text:span text:style-name="T1">10.4 </text:span>Generated logical-layer weights shall not be included in persistent parameter counts.</text:p>
      <text:p text:style-name="Text_20_body"><text:span text:style-name="T1">10.5 </text:span>The implementation shall report persistent sheet parameters separately from conventional non-sheet parameters.</text:p>
      <text:p text:style-name="Text_20_body"><text:span text:style-name="T1">10.6 </text:span>The implementation shall report the dense-equivalent logical parameter count for the same L, d, and bias configuration.</text:p>
      <text:p text:style-name="Text_20_body"><text:span text:style-name="T1">10.7 </text:span>The implementation shall report parameter counts by tensor family.</text:p>
      <text:p text:style-name="Text_20_body"><text:span text:style-name="T1">10.8 </text:span>The implementation shall report compression ratios relative to both the matched dense block matrices and, where calculated, a depth-only THOG representation with the same P.</text:p>
      <text:p text:style-name="Text_20_body"><text:span text:style-name="T1">10.9 </text:span>For L equal to 144, d equal to 768, P equal to 16, Q_d equal to 128, and Q_4d equal to 512, the four large matrix families shall contain 18,874,368 persistent sheet coefficients in total.</text:p>
      <text:p text:style-name="Text_20_body"><text:span text:style-name="T1">10.10 </text:span>The corresponding dense-equivalent large matrix stack shall contain 1,019,215,872 scalar weights.</text:p>
      <text:p text:style-name="Text_20_body"><text:span text:style-name="T1">10.11 </text:span>The corresponding depth-only THOG representation with 16 terms per scalar weight would contain 113,246,208 large-matrix coefficients.</text:p>
      <text:p text:style-name="Text_20_body"><text:span text:style-name="T1">10.12 </text:span>The values in 10.9 through 10.11 exclude embeddings, positional embeddings, final layer normalisation, biases, block layer-normalisation vectors, and the tied language-model head.</text:p>
      <table:table table:name="Table2" table:style-name="Table2">
        <table:table-column table:style-name="Table2.A"/>
        <table:table-column table:style-name="Table2.B"/>
        <table:table-column table:style-name="Table2.C"/>
        <table:table-column table:style-name="Table2.D"/>
        <table:table-row>
          <table:table-cell table:style-name="TableRowCell" office:value-type="string">
            <text:p text:style-name="Table_20_Contents"><text:span text:style-name="T1">Large matrix family</text:span></text:p>
          </table:table-cell>
          <table:table-cell table:style-name="TableRowCell" office:value-type="string">
            <text:p text:style-name="Table_20_Contents"><text:span text:style-name="T1">Rows</text:span></text:p>
          </table:table-cell>
          <table:table-cell table:style-name="TableRowCell" office:value-type="string">
            <text:p text:style-name="Table_20_Contents"><text:span text:style-name="T1">Row width</text:span></text:p>
          </table:table-cell>
          <table:table-cell table:style-name="TableRowCell" office:value-type="string">
            <text:p text:style-name="Table_20_Contents"><text:span text:style-name="T1">Sheet coefficients</text:span></text:p>
          </table:table-cell>
        </table:table-row>
        <table:table-row>
          <table:table-cell table:style-name="TableRowCell" office:value-type="string">
            <text:p text:style-name="Table_20_Contents">Attention input projection</text:p>
          </table:table-cell>
          <table:table-cell table:style-name="TableRowCell" office:value-type="string">
            <text:p text:style-name="Table_20_Contents">2304</text:p>
          </table:table-cell>
          <table:table-cell table:style-name="TableRowCell" office:value-type="string">
            <text:p text:style-name="Table_20_Contents">768</text:p>
          </table:table-cell>
          <table:table-cell table:style-name="TableRowCell" office:value-type="string">
            <text:p text:style-name="Table_20_Contents">4,718,592</text:p>
          </table:table-cell>
        </table:table-row>
        <table:table-row>
          <table:table-cell table:style-name="TableRowCell" office:value-type="string">
            <text:p text:style-name="Table_20_Contents">Attention output projection</text:p>
          </table:table-cell>
          <table:table-cell table:style-name="TableRowCell" office:value-type="string">
            <text:p text:style-name="Table_20_Contents">768</text:p>
          </table:table-cell>
          <table:table-cell table:style-name="TableRowCell" office:value-type="string">
            <text:p text:style-name="Table_20_Contents">768</text:p>
          </table:table-cell>
          <table:table-cell table:style-name="TableRowCell" office:value-type="string">
            <text:p text:style-name="Table_20_Contents">1,572,864</text:p>
          </table:table-cell>
        </table:table-row>
        <table:table-row>
          <table:table-cell table:style-name="TableRowCell" office:value-type="string">
            <text:p text:style-name="Table_20_Contents">MLP expansion</text:p>
          </table:table-cell>
          <table:table-cell table:style-name="TableRowCell" office:value-type="string">
            <text:p text:style-name="Table_20_Contents">3072</text:p>
          </table:table-cell>
          <table:table-cell table:style-name="TableRowCell" office:value-type="string">
            <text:p text:style-name="Table_20_Contents">768</text:p>
          </table:table-cell>
          <table:table-cell table:style-name="TableRowCell" office:value-type="string">
            <text:p text:style-name="Table_20_Contents">6,291,456</text:p>
          </table:table-cell>
        </table:table-row>
        <table:table-row>
          <table:table-cell table:style-name="TableRowCell" office:value-type="string">
            <text:p text:style-name="Table_20_Contents">MLP contraction</text:p>
          </table:table-cell>
          <table:table-cell table:style-name="TableRowCell" office:value-type="string">
            <text:p text:style-name="Table_20_Contents">768</text:p>
          </table:table-cell>
          <table:table-cell table:style-name="TableRowCell" office:value-type="string">
            <text:p text:style-name="Table_20_Contents">3072</text:p>
          </table:table-cell>
          <table:table-cell table:style-name="TableRowCell" office:value-type="string">
            <text:p text:style-name="Table_20_Contents">6,291,456</text:p>
          </table:table-cell>
        </table:table-row>
        <table:table-row>
          <table:table-cell table:style-name="TableRowCell" office:value-type="string">
            <text:p text:style-name="Table_20_Contents">Total</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18,874,368</text:p>
          </table:table-cell>
        </table:table-row>
      </table:table>
      <text:p text:style-name="First_20_paragraph">Non-normative note: The table is an exact reference calculation for the principal L144/D768/P16/Q128 geometry. It is not the whole-model parameter count.</text:p>
      <text:h text:style-name="Heading_20_1" text:outline-level="1"><text:bookmark-start text:name="weight-materialisation-and-execution"/>11. Weight materialisation and execution<text:bookmark-end text:name="weight-materialisation-and-execution"/></text:h>
      <text:p text:style-name="First_20_paragraph"><text:span text:style-name="T1">11.1 </text:span>The implementation shall provide a correctness-first reference execution path.</text:p>
      <text:p text:style-name="Text_20_body"><text:span text:style-name="T1">11.2 </text:span>The implementation shall generate the tensor families required by one logical layer from compact sheet coefficients and fixed basis rows.</text:p>
      <text:p text:style-name="Text_20_body"><text:span text:style-name="T1">11.3 </text:span>The implementation shall not persist the full sampled L-by-R_f-by-C_f logical weight collection.</text:p>
      <text:p text:style-name="Text_20_body"><text:span text:style-name="T1">11.4 </text:span>The implementation shall release generated logical-layer weights when they are no longer required by forward or backward computation.</text:p>
      <text:p text:style-name="Text_20_body"><text:span text:style-name="T1">11.5 </text:span>The implementation shall support activation-checkpointed ephemeral execution in which required generated weights are recreated during backward computation.</text:p>
      <text:p text:style-name="Text_20_body"><text:span text:style-name="T1">11.6 </text:span>Checkpointed execution shall preserve random-number-generator state where required for dropout equivalence.</text:p>
      <text:p text:style-name="Text_20_body"><text:span text:style-name="T1">11.7 </text:span>Evaluation and inference shall not perform unnecessary activation-checkpoint recomputation.</text:p>
      <text:p text:style-name="Text_20_body"><text:span text:style-name="T1">11.8 </text:span>The materialisation path shall preserve gradient flow from cross-entropy loss through generated weights to every used sheet coefficient tensor.</text:p>
      <text:p text:style-name="Text_20_body"><text:span text:style-name="T1">11.9 </text:span>Generated tensors shall use the correct device and computation dtype for the surrounding model operation.</text:p>
      <text:p text:style-name="Text_20_body"><text:span text:style-name="T1">11.10 </text:span>Fixed bases may be cached as non-persistent buffers when doing so reduces repeated work without changing model state semantics.</text:p>
      <text:p text:style-name="Text_20_body"><text:span text:style-name="T1">11.11 </text:span>The implementation may batch or fuse row-sheet evaluation provided that the mathematical result and gradient are equivalent to the reference equation.</text:p>
      <text:p text:style-name="Text_20_body"><text:span text:style-name="T1">11.12 </text:span>Custom CUDA kernels shall not be required for the first functionally complete implementation.</text:p>
      <text:h text:style-name="Heading_20_1" text:outline-level="1"><text:bookmark-start text:name="initialization"/>12. Initialization<text:bookmark-end text:name="initialization"/></text:h>
      <text:p text:style-name="First_20_paragraph"><text:span text:style-name="T1">12.1 </text:span>Sheet initialization shall produce generated matrix weights with family-specific mean and scale compatible with nanoGPT initialization objectives.</text:p>
      <text:p text:style-name="Text_20_body"><text:span text:style-name="T1">12.2 </text:span>Attention output and MLP contraction projections shall retain the depth-dependent residual scaling intent of nanoGPT initialization.</text:p>
      <text:p text:style-name="Text_20_body"><text:span text:style-name="T1">12.3 </text:span>Generated layer-normalisation scale vectors shall initialize to exact ones where they are represented by sheets.</text:p>
      <text:p text:style-name="Text_20_body"><text:span text:style-name="T1">12.4 </text:span>Generated bias vectors shall initialize to exact zeros where bias is enabled and represented by sheets.</text:p>
      <text:p text:style-name="Text_20_body"><text:span text:style-name="T1">12.5 </text:span>Initialization shall not require temporary persistence of a complete dense logical block stack.</text:p>
      <text:p text:style-name="Text_20_body"><text:span text:style-name="T1">12.6 </text:span>Initialization shall be deterministic under a fixed model-construction seed.</text:p>
      <text:p text:style-name="Text_20_body"><text:span text:style-name="T1">12.7 </text:span>Initialization shall avoid coefficient scaling that causes generated weight variance to grow with P or Q_f.</text:p>
      <text:p text:style-name="Text_20_body"><text:span text:style-name="T1">12.8 </text:span>The implementation plan shall derive and test the coefficient variance needed to meet 12.1 and 12.7.</text:p>
      <text:p text:style-name="Text_20_body"><text:span text:style-name="T1">12.9 </text:span>A newly initialized compressed sheet model shall not be required to match the exact weights or outputs of a separately initialized dense nanoGPT model.</text:p>
      <text:h text:style-name="Heading_20_1" text:outline-level="1"><text:bookmark-start text:name="training-and-optimisation"/>13. Training and optimisation<text:bookmark-end text:name="training-and-optimisation"/></text:h>
      <text:p text:style-name="First_20_paragraph"><text:span text:style-name="T1">13.1 </text:span>Chebyshev Sheet shall train end to end from scratch using next-token cross-entropy.</text:p>
      <text:p text:style-name="Text_20_body"><text:span text:style-name="T1">13.2 </text:span>The first implementation shall not add auxiliary weight reconstruction, logit matching, ranking, KL-divergence, smoothness, latent-MSE, or distillation losses.</text:p>
      <text:p text:style-name="Text_20_body"><text:span text:style-name="T1">13.3 </text:span>The polynomial basis constraint itself shall provide the initial smoothness and capacity restriction.</text:p>
      <text:p text:style-name="Text_20_body"><text:span text:style-name="T1">13.4 </text:span>The optimizer shall update the compact sheet coefficients directly.</text:p>
      <text:p text:style-name="Text_20_body"><text:span text:style-name="T1">13.5 </text:span>The default optimizer shall remain compatible with nanoGPT AdamW training.</text:p>
      <text:p text:style-name="Text_20_body"><text:span text:style-name="T1">13.6 </text:span>Weight decay treatment shall preserve the conventional distinction between matrix-like weights and layer-normalisation or bias parameters, even when all are stored as sheet coefficients.</text:p>
      <text:p text:style-name="Text_20_body"><text:span text:style-name="T1">13.7 </text:span>Gradient clipping, learning-rate warm-up, and learning-rate decay shall remain configurable through the training path.</text:p>
      <text:p text:style-name="Text_20_body"><text:span text:style-name="T1">13.8 </text:span>The architecture shall support single-process GPU training.</text:p>
      <text:p text:style-name="Text_20_body"><text:span text:style-name="T1">13.9 </text:span>The architecture shall support DistributedDataParallel training.</text:p>
      <text:p text:style-name="Text_20_body"><text:span text:style-name="T1">13.10 </text:span>The architecture shall support the mixed-precision modes supported by the retained nanoGPT training path.</text:p>
      <text:p text:style-name="Text_20_body"><text:span text:style-name="T1">13.11 </text:span>Completed optimizer updates shall be counted exactly and consistently across dense and sheet runs.</text:p>
      <text:p text:style-name="Text_20_body"><text:span text:style-name="T1">13.12 </text:span>The data-sampling random-number stream used for controlled comparisons shall be independent of model-construction random-number consumption.</text:p>
      <text:h text:style-name="Heading_20_1" text:outline-level="1"><text:bookmark-start text:name="checkpoint-resume-and-inference"/>14. Checkpoint, resume, and inference<text:bookmark-end text:name="checkpoint-resume-and-inference"/></text:h>
      <text:p text:style-name="First_20_paragraph"><text:span text:style-name="T1">14.1 </text:span>A Chebyshev Sheet checkpoint shall identify its model type as thog2_sheet.</text:p>
      <text:p text:style-name="Text_20_body"><text:span text:style-name="T1">14.2 </text:span>A checkpoint shall store compact sheet coefficients and conventional non-sheet model parameters.</text:p>
      <text:p text:style-name="Text_20_body"><text:span text:style-name="T1">14.3 </text:span>A checkpoint shall not store a persistent full dense logical block stack.</text:p>
      <text:p text:style-name="Text_20_body"><text:span text:style-name="T1">14.4 </text:span>A checkpoint shall store all model arguments needed to reconstruct L, d, P, Q_d, width-scaling rules, bias state, and execution-compatible configuration.</text:p>
      <text:p text:style-name="Text_20_body"><text:span text:style-name="T1">14.5 </text:span>Fixed basis matrices should be regenerated from checkpoint configuration rather than stored as persistent state.</text:p>
      <text:p text:style-name="Text_20_body"><text:span text:style-name="T1">14.6 </text:span>Resume shall restore model state, optimizer state, update count, scheduler state, and random state required by the retained training workflow.</text:p>
      <text:p text:style-name="Text_20_body"><text:span text:style-name="T1">14.7 </text:span>Resume shall fail clearly when requested sheet geometry is incompatible with the checkpoint geometry.</text:p>
      <text:p text:style-name="Text_20_body"><text:span text:style-name="T1">14.8 </text:span>Execution-only activation-checkpoint settings may be changed on resume where doing so does not alter model state.</text:p>
      <text:p text:style-name="Text_20_body"><text:span text:style-name="T1">14.9 </text:span>A compact Chebyshev Sheet checkpoint shall be loadable directly for text generation without conversion to a dense checkpoint.</text:p>
      <text:p text:style-name="Text_20_body"><text:span text:style-name="T1">14.10 </text:span>Inference shall reconstruct the model from checkpoint metadata and load compact coefficient state.</text:p>
      <text:p text:style-name="Text_20_body"><text:span text:style-name="T1">14.11 </text:span>The dense nanoGPT path shall continue to load compatible dense nanoGPT checkpoints independently of sheet checkpoints.</text:p>
      <text:h text:style-name="Heading_20_1" text:outline-level="1"><text:bookmark-start text:name="configuration-naming-and-user-controls"/>15. Configuration, naming, and user controls<text:bookmark-end text:name="configuration-naming-and-user-controls"/></text:h>
      <text:p text:style-name="First_20_paragraph"><text:span text:style-name="T1">15.1 </text:span>The codebase shall expose at least two architecture selections: dense and thog2_sheet.</text:p>
      <text:p text:style-name="Text_20_body"><text:span text:style-name="T1">15.2 </text:span>The dense architecture shall remain available without allocating sheet parameters.</text:p>
      <text:p text:style-name="Text_20_body"><text:span text:style-name="T1">15.3 </text:span>The sheet architecture shall expose a configurable depth basis term count P.</text:p>
      <text:p text:style-name="Text_20_body"><text:span text:style-name="T1">15.4 </text:span>The sheet architecture shall expose a configurable base row basis term count Q_d for rows of width d.</text:p>
      <text:p text:style-name="Text_20_body"><text:span text:style-name="T1">15.5 </text:span>The sheet architecture shall derive other row basis counts by the documented proportional width rule unless an explicit validated override is provided.</text:p>
      <text:p text:style-name="Text_20_body"><text:span text:style-name="T1">15.6 </text:span>Run names shall identify the architecture, L, d, P, and Q_d unambiguously.</text:p>
      <text:p text:style-name="Text_20_body"><text:span text:style-name="T1">15.7 </text:span>Checkpoint metadata and experiment telemetry shall record the derived Q_f value for every generated tensor-family width.</text:p>
      <text:p text:style-name="Text_20_body"><text:span text:style-name="T1">15.8 </text:span>Startup output shall report persistent parameters, dense-equivalent parameters, sheet coefficient parameters, and per-family sheet geometry.</text:p>
      <text:p text:style-name="Text_20_body"><text:span text:style-name="T1">15.9 </text:span>Invalid geometry shall be rejected before model training begins.</text:p>
      <text:p text:style-name="Text_20_body"><text:span text:style-name="T1">15.10 </text:span>The command-line and wrapper design shall be specified in the later implementation plan rather than assumed from the existing thog wrapper.</text:p>
      <text:h text:style-name="Heading_20_1" text:outline-level="1"><text:bookmark-start text:name="telemetry-and-diagnostics"/>16. Telemetry and diagnostics<text:bookmark-end text:name="telemetry-and-diagnostics"/></text:h>
      <text:p text:style-name="First_20_paragraph"><text:span text:style-name="T1">16.1 </text:span>Training telemetry shall include training loss and validation loss using the retained next-token cross-entropy definition.</text:p>
      <text:p text:style-name="Text_20_body"><text:span text:style-name="T1">16.2 </text:span>Telemetry shall include completed optimizer updates, consumed training tokens, elapsed training time, and throughput.</text:p>
      <text:p text:style-name="Text_20_body"><text:span text:style-name="T1">16.3 </text:span>Telemetry shall include peak allocated and peak reserved GPU memory at documented phases.</text:p>
      <text:p text:style-name="Text_20_body"><text:span text:style-name="T1">16.4 </text:span>Telemetry shall include coefficient RMS and gradient norm by generated tensor family.</text:p>
      <text:p text:style-name="Text_20_body"><text:span text:style-name="T1">16.5 </text:span>Telemetry shall include sampled generated-weight RMS, standard deviation, and maximum absolute value by tensor family.</text:p>
      <text:p text:style-name="Text_20_body"><text:span text:style-name="T1">16.6 </text:span>Telemetry shall include depth-basis energy by order or a documented aggregate that reveals whether high depthwise terms are used.</text:p>
      <text:p text:style-name="Text_20_body"><text:span text:style-name="T1">16.7 </text:span>Telemetry shall include row-basis energy by order or a documented aggregate that reveals whether high rowwise terms are used.</text:p>
      <text:p text:style-name="Text_20_body"><text:span text:style-name="T1">16.8 </text:span>Telemetry shall include a high-order energy fraction for each axis using a documented cutoff.</text:p>
      <text:p text:style-name="Text_20_body"><text:span text:style-name="T1">16.9 </text:span>Telemetry should include sampled vertical and horizontal finite-difference roughness measures on generated sheets.</text:p>
      <text:p text:style-name="Text_20_body"><text:span text:style-name="T1">16.10 </text:span>Telemetry should include numerical-conditioning diagnostics for each distinct basis matrix used by a run.</text:p>
      <text:p text:style-name="Text_20_body"><text:span text:style-name="T1">16.11 </text:span>Expensive diagnostics shall run at a configurable logging cadence rather than on every micro-step.</text:p>
      <text:p text:style-name="Text_20_body"><text:span text:style-name="T1">16.12 </text:span>Telemetry computations shall be detached and shall not alter model gradients or optimizer state.</text:p>
      <text:h text:style-name="Heading_20_1" text:outline-level="1"><text:bookmark-start text:name="functional-acceptance-requirements"/>17. Functional acceptance requirements<text:bookmark-end text:name="functional-acceptance-requirements"/></text:h>
      <text:p text:style-name="First_20_paragraph"><text:span text:style-name="T1">17.1 </text:span>The retained dense nanoGPT path shall pass its pre-existing functional tests after sheet support is added.</text:p>
      <text:p text:style-name="Text_20_body"><text:span text:style-name="T1">17.2 </text:span>For every supported matrix family, generated tensor shapes shall match the corresponding dense nanoGPT tensor shapes exactly.</text:p>
      <text:p text:style-name="Text_20_body"><text:span text:style-name="T1">17.3 </text:span>A reference materialisation test shall match direct evaluation of B_depth, A_f, and B_row_f within the documented numerical tolerance.</text:p>
      <text:p text:style-name="Text_20_body"><text:span text:style-name="T1">17.4 </text:span>A constant coefficient configuration shall generate the expected constant sheet exactly within floating-point tolerance.</text:p>
      <text:p text:style-name="Text_20_body"><text:span text:style-name="T1">17.5 </text:span>At P equal to L and Q_f equal to C_f for a small test geometry, the parameterisation shall be capable of reproducing an arbitrary sampled L-by-C_f row sheet within documented numerical tolerance.</text:p>
      <text:p text:style-name="Text_20_body"><text:span text:style-name="T1">17.6 </text:span>Every trainable sheet coefficient tensor used by a representative forward pass shall receive a finite gradient during backward computation.</text:p>
      <text:p text:style-name="Text_20_body"><text:span text:style-name="T1">17.7 </text:span>Reference and activation-checkpointed sheet execution shall agree within a documented tolerance under deterministic conditions.</text:p>
      <text:p text:style-name="Text_20_body"><text:span text:style-name="T1">17.8 </text:span>Checkpoint save and reload shall reproduce model state and deterministic outputs within a documented tolerance.</text:p>
      <text:p text:style-name="Text_20_body"><text:span text:style-name="T1">17.9 </text:span>Resume shall continue training without loss of optimizer-group or scheduler semantics.</text:p>
      <text:p text:style-name="Text_20_body"><text:span text:style-name="T1">17.10 </text:span>Single-process and DDP smoke training shall complete without deadlock, missing gradients, or rank-dependent model-state divergence attributable to sheet generation.</text:p>
      <text:p text:style-name="Text_20_body"><text:span text:style-name="T1">17.11 </text:span>Compact-checkpoint inference shall generate text without first materialising or saving a dense model checkpoint.</text:p>
      <text:p text:style-name="Text_20_body"><text:span text:style-name="T1">17.12 </text:span>The implementation shall demonstrate that the complete dense logical block stack is absent from persistent model state and checkpoint state.</text:p>
      <text:p text:style-name="Text_20_body"><text:span text:style-name="T1">17.13 </text:span>The complete regression suite defined by the later test plan shall pass before implementation acceptance.</text:p>
      <text:h text:style-name="Heading_20_1" text:outline-level="1"><text:bookmark-start text:name="scientific-evaluation-requirements"/>18. Scientific evaluation requirements<text:bookmark-end text:name="scientific-evaluation-requirements"/></text:h>
      <text:p text:style-name="First_20_paragraph"><text:span text:style-name="T1">18.1 </text:span>Functional acceptance shall not be interpreted as evidence that the horizontal smoothness hypothesis is correct.</text:p>
      <text:p text:style-name="Text_20_body"><text:span text:style-name="T1">18.2 </text:span>The first controlled scientific comparison shall include a matched dense nanoGPT model and at least one thog2_sheet model with the same logical L, d, attention-head count, context length, dataset, and training-token budget.</text:p>
      <text:p text:style-name="Text_20_body"><text:span text:style-name="T1">18.3 </text:span>The principal sheet configuration shall use P equal to 16 and Q_d equal to 128 for d equal to 768.</text:p>
      <text:p text:style-name="Text_20_body"><text:span text:style-name="T1">18.4 </text:span>The first row-capacity sweep should include Q_d equal to 64, 128, and 256, with proportionally scaled values for 4d-wide rows.</text:p>
      <text:p text:style-name="Text_20_body"><text:span text:style-name="T1">18.5 </text:span>Compared runs shall consume an identical or provably equivalent training-batch trace.</text:p>
      <text:p text:style-name="Text_20_body"><text:span text:style-name="T1">18.6 </text:span>Compared runs shall use a fixed shared validation sample and a materially adequate validation size.</text:p>
      <text:p text:style-name="Text_20_body"><text:span text:style-name="T1">18.7 </text:span>The primary quality comparison shall use validation cross-entropy at equal completed optimizer updates and equal consumed training tokens.</text:p>
      <text:p text:style-name="Text_20_body"><text:span text:style-name="T1">18.8 </text:span>The comparison shall also report validation loss against wall-clock time, throughput, peak memory, and persistent parameters.</text:p>
      <text:p text:style-name="Text_20_body"><text:span text:style-name="T1">18.9 </text:span>Existing THOGv1 results may be used as an external reference but shall not create a runtime or repository dependency for thog2.</text:p>
      <text:p text:style-name="Text_20_body"><text:span text:style-name="T1">18.10 </text:span>A promising result shall require stable optimization and reproducible quality consistent with the claimed compression advantage.</text:p>
      <text:p text:style-name="Text_20_body"><text:span text:style-name="T1">18.11 </text:span>Failure of a low-Q_d configuration shall not by itself falsify the sheet concept unless higher-capacity configurations show that useful performance requires Q_d approaching the full row width.</text:p>
      <text:h text:style-name="Heading_20_1" text:outline-level="1"><text:bookmark-start text:name="explicit-non-goals-for-the-first-implementation"/>19. Explicit non-goals for the first implementation<text:bookmark-end text:name="explicit-non-goals-for-the-first-implementation"/></text:h>
      <text:p text:style-name="First_20_paragraph"><text:span text:style-name="T1">19.1 </text:span>The first implementation shall not integrate into or modify the existing thog repository.</text:p>
      <text:p text:style-name="Text_20_body"><text:span text:style-name="T1">19.2 </text:span>The first implementation shall not incorporate Vermeer or another layer-specific residual correction.</text:p>
      <text:p text:style-name="Text_20_body"><text:span text:style-name="T1">19.3 </text:span>The first implementation shall not reconstruct or imitate a separately trained dense model.</text:p>
      <text:p text:style-name="Text_20_body"><text:span text:style-name="T1">19.4 </text:span>The first implementation shall not use a teacher model or knowledge distillation.</text:p>
      <text:p text:style-name="Text_20_body"><text:span text:style-name="T1">19.5 </text:span>The first implementation shall not use learned within-row addresses, learned row permutations, or coordinate warping.</text:p>
      <text:p text:style-name="Text_20_body"><text:span text:style-name="T1">19.6 </text:span>The first implementation shall not use a three-dimensional depth-by-output-by-input Chebyshev volume.</text:p>
      <text:p text:style-name="Text_20_body"><text:span text:style-name="T1">19.7 </text:span>The first implementation shall not flatten a complete matrix into one sheet spanning both output rows and input columns.</text:p>
      <text:p text:style-name="Text_20_body"><text:span text:style-name="T1">19.8 </text:span>The first implementation shall not claim that interweight samples correspond to meaningful intermediate latent coordinates.</text:p>
      <text:p text:style-name="Text_20_body"><text:span text:style-name="T1">19.9 </text:span>The first implementation shall not change model depth or width at inference by resampling the continuous sheet.</text:p>
      <text:p text:style-name="Text_20_body"><text:span text:style-name="T1">19.10 </text:span>The first implementation shall not require custom fused kernels before correctness, training, checkpoint, and inference paths are complete.</text:p>
      <text:p text:style-name="Text_20_body"><text:span text:style-name="T1">19.11 </text:span>The first implementation shall not claim mechanistic interpretability from sheet coefficients or basis orders alone.</text:p>
      <text:h text:style-name="Heading_20_1" text:outline-level="1"><text:bookmark-start text:name="known-risks-and-open-questions"/>20. Known risks and open questions<text:bookmark-end text:name="known-risks-and-open-questions"/></text:h>
      <text:p text:style-name="First_20_paragraph"><text:span text:style-name="T1">20.1 </text:span>The fixed left-to-right within-row coordinate may impose a geometry that the model cannot exploit effectively.</text:p>
      <text:p text:style-name="Text_20_body"><text:span text:style-name="T1">20.2 </text:span>Training may fail to organise latent coordinates into a form compatible with rowwise smoothness.</text:p>
      <text:p text:style-name="Text_20_body"><text:span text:style-name="T1">20.3 </text:span>The chosen Q_d may be too small to represent useful rowwise profiles or unnecessarily large to deliver the intended compression.</text:p>
      <text:p text:style-name="Text_20_body"><text:span text:style-name="T1">20.4 </text:span>High rowwise Chebyshev orders may create correlated gradients or numerical-conditioning problems even when basis values remain bounded.</text:p>
      <text:p text:style-name="Text_20_body"><text:span text:style-name="T1">20.5 </text:span>Sheet materialisation may reduce parameter memory while adding enough computation to harm throughput materially.</text:p>
      <text:p text:style-name="Text_20_body"><text:span text:style-name="T1">20.6 </text:span>Optimizer state for sheet coefficients and conventional embeddings may remain a major memory cost even when logical block weights are highly compressed.</text:p>
      <text:p text:style-name="Text_20_body"><text:span text:style-name="T1">20.7 </text:span>A single proportional Q_f rule may not be equally suitable for all tensor families despite using one universal mathematical mechanism.</text:p>
      <text:p text:style-name="Text_20_body"><text:span text:style-name="T1">20.8 </text:span>Representing layer-normalisation and bias vectors as sheets may add complexity with negligible parameter benefit.</text:p>
      <text:p text:style-name="Text_20_body"><text:span text:style-name="T1">20.9 </text:span>A fresh nanoGPT fork may diverge from improvements already made in thog unless useful infrastructure is deliberately ported after review.</text:p>
      <text:p text:style-name="Text_20_body"><text:span text:style-name="T1">20.10 </text:span>Successful approximation of sampled weight sheets shall not guarantee good language modelling; end-to-end controlled training evidence is required.</text:p>
      <text:p text:style-name="Text_20_body"><text:span text:style-name="T1">20.11 </text:span>Any response to these risks that changes the core architectural hypothesis shall require a versioned specification amendment rather than an undocumented implementation workaround.</text:p>
      <text:h text:style-name="Heading_20_1" text:outline-level="1"><text:bookmark-start text:name="required-follow-on-documents-and-change-control"/>21. Required follow-on documents and change control<text:bookmark-end text:name="required-follow-on-documents-and-change-control"/></text:h>
      <text:p text:style-name="First_20_paragraph"><text:span text:style-name="T1">21.1 </text:span>A separate implementation plan shall define source files, classes, configuration fields, initialization derivation, optimizer integration, checkpoint schema, wrappers, telemetry, and staged delivery.</text:p>
      <text:p text:style-name="Text_20_body"><text:span text:style-name="T1">21.2 </text:span>A separate test plan shall define mathematical, unit, integration, GPU, DDP, checkpoint, inference, regression, performance, and controlled-comparison tests.</text:p>
      <text:p text:style-name="Text_20_body"><text:span text:style-name="T1">21.3 </text:span>A separate staging plan shall divide implementation into the minimum sensible independently testable stages.</text:p>
      <text:p text:style-name="Text_20_body"><text:span text:style-name="T1">21.4 </text:span>An as-built document shall be produced after implementation and shall identify every material departure from this specification.</text:p>
      <text:p text:style-name="Text_20_body"><text:span text:style-name="T1">21.5 </text:span>This specification shall remain outside the existing thog repository until the user authorises its addition to the future thog2 repository.</text:p>
      <text:p text:style-name="Text_20_body"><text:span text:style-name="T1">21.6 </text:span>When added to thog2, the specification shall be committed as a versioned project document rather than replacing its external source without traceability.</text:p>
      <text:p text:style-name="Text_20_body"><text:span text:style-name="T1">21.7 </text:span>Changes to the requirements shall increment the document version and identify the modified requirement identifiers.</text:p>
      <text:p text:style-name="Text_20_body">Non-normative note: End of normative requirements. The later implementation plan may make engineering choices only within the constraints above or through an explicit requirements revi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6-07-02T01:12:41Z</meta:creation-date>
    <dc:date>2026-07-02T01:12:41Z</dc:date>
  </office:meta>
</office:document-meta>
</file>