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fo="urn:oasis:names:tc:opendocument:xmlns:xsl-fo-compatible:1.0" xmlns:svg="urn:oasis:names:tc:opendocument:xmlns:svg-compatible:1.0" office:version="1.2">
  <office:font-face-decls>
    <style:font-face style:name="Liberation Serif" svg:font-family="Liberation Serif"/>
    <style:font-face style:name="Liberation Sans" svg:font-family="Liberation Sans"/>
    <style:font-face style:name="Liberation Mono" svg:font-family="Liberation Mono"/>
  </office:font-face-decls>
  <office:automatic-styles>
    <style:style style:name="Title" style:family="paragraph">
      <style:paragraph-properties fo:text-align="center" fo:margin-top="0.2in" fo:margin-bottom="0.02in"/>
      <style:text-properties style:font-name="Liberation Serif" fo:font-size="26pt" fo:font-weight="bold"/>
    </style:style>
    <style:style style:name="Subtitle" style:family="paragraph">
      <style:paragraph-properties fo:text-align="center" fo:margin-bottom="0.08in"/>
      <style:text-properties style:font-name="Liberation Serif" fo:font-size="14pt" fo:font-style="italic"/>
    </style:style>
    <style:style style:name="SmallCenter" style:family="paragraph">
      <style:paragraph-properties fo:text-align="center" fo:margin-bottom="0.12in"/>
      <style:text-properties style:font-name="Liberation Serif" fo:font-size="9pt"/>
    </style:style>
    <style:style style:name="Body" style:family="paragraph">
      <style:paragraph-properties fo:margin-bottom="0.06in" fo:line-height="108%"/>
      <style:text-properties style:font-name="Liberation Serif" fo:font-size="11pt"/>
    </style:style>
    <style:style style:name="Req" style:family="paragraph">
      <style:paragraph-properties fo:margin-bottom="0.035in" fo:line-height="105%"/>
      <style:text-properties style:font-name="Liberation Serif" fo:font-size="11pt"/>
    </style:style>
    <style:style style:name="Code" style:family="paragraph">
      <style:paragraph-properties fo:margin-left="0.35in" fo:margin-bottom="0.025in"/>
      <style:text-properties style:font-name="Liberation Mono" fo:font-size="8.5pt"/>
    </style:style>
    <style:style style:name="TOC1" style:family="paragraph">
      <style:paragraph-properties fo:margin-bottom="0.01in"/>
      <style:text-properties style:font-name="Liberation Serif" fo:font-size="10.5pt"/>
    </style:style>
    <style:style style:name="TOC2" style:family="paragraph">
      <style:paragraph-properties fo:margin-left="0.25in" fo:margin-bottom="0.01in"/>
      <style:text-properties style:font-name="Liberation Serif" fo:font-size="10.5pt"/>
    </style:style>
    <style:style style:name="Heading_20_1" style:family="paragraph" style:parent-style-name="Heading" style:default-outline-level="1">
      <style:paragraph-properties fo:margin-top="0.18in" fo:margin-bottom="0.08in" fo:break-after="auto"/>
      <style:text-properties style:font-name="Liberation Serif" fo:font-size="18pt" fo:font-weight="bold"/>
    </style:style>
    <style:style style:name="Heading_20_2" style:family="paragraph" style:parent-style-name="Heading" style:default-outline-level="2">
      <style:paragraph-properties fo:margin-top="0.10in" fo:margin-bottom="0.055in"/>
      <style:text-properties style:font-name="Liberation Serif" fo:font-size="13pt" fo:font-weight="bold"/>
    </style:style>
    <style:style style:name="Heading_20_3" style:family="paragraph" style:parent-style-name="Heading" style:default-outline-level="3">
      <style:paragraph-properties fo:margin-top="0.08in" fo:margin-bottom="0.04in"/>
      <style:text-properties style:font-name="Liberation Serif" fo:font-size="11.5pt" fo:font-weight="bold"/>
    </style:style>
    <style:style style:name="Bold" style:family="text">
      <style:text-properties fo:font-weight="bold"/>
    </style:style>
    <style:style style:name="TableText" style:family="paragraph">
      <style:paragraph-properties fo:margin-bottom="0in"/>
      <style:text-properties style:font-name="Liberation Sans" fo:font-size="7.4pt"/>
    </style:style>
    <style:style style:name="TableHeader" style:family="paragraph">
      <style:paragraph-properties fo:margin-bottom="0in"/>
      <style:text-properties style:font-name="Liberation Sans" fo:font-size="7.5pt" fo:font-weight="bold"/>
    </style:style>
    <style:style style:name="HeaderCell" style:family="table-cell">
      <style:table-cell-properties fo:border="0.45pt solid #606060" fo:background-color="#D9EAF7" fo:padding="0.025in"/>
    </style:style>
    <style:style style:name="BodyCell" style:family="table-cell">
      <style:table-cell-properties fo:border="0.45pt solid #606060" fo:padding="0.025in"/>
    </style:style>
    <style:style style:name="PageBreak" style:family="paragraph">
      <style:paragraph-properties fo:break-before="page"/>
    </style:style>
  </office:automatic-styles>
  <office:body>
    <office:text>
      <text:p text:style-name="Title">THOG2 Chebyshev Sheet</text:p>
      <text:p text:style-name="Title">Requirements Specification</text:p>
      <text:p text:style-name="Subtitle">v0.21 - integrated compact-depth, block, and semantic sheet geometry</text:p>
      <text:p text:style-name="SmallCenter">Target path: docs/THOG2_Chebyshev_Sheet_Requirements_Specification_v0.21.odt</text:p>
      <text:p text:style-name="Body">This specification consolidates the original THOG2 Chebyshev sheet requirements, the curve/sheet/block basis specification, and the later semantic sheet requirements into a single integrated design document. It is written as if the compact-depth idea, the clean-axis rule, the block geometries, and the semantic sheet ladder had been specified together from the start.</text:p>
      <text:p text:style-name="Body">The document intentionally focuses on requirements and architecture. It does not cover test plans, implementation staging, current run quality, or empirical performance status.</text:p>
      <text:h text:style-name="Heading_20_1" text:outline-level="1">Table of Contents</text:h>
      <text:p text:style-name="TOC1">1  Concept and Architecture</text:p>
      <text:p text:style-name="TOC2">1.1  Architectural idea</text:p>
      <text:p text:style-name="TOC2">1.2  Transformer boundary and token interface</text:p>
      <text:p text:style-name="TOC2">1.3  Depth as the primary compact axis</text:p>
      <text:p text:style-name="TOC2">1.4  Whole axes versus compressed axes</text:p>
      <text:p text:style-name="TOC2">1.5  Geometry ladder</text:p>
      <text:p text:style-name="TOC1">2  Vocabulary, Axes, and Naming</text:p>
      <text:p text:style-name="TOC2">2.1  Matrix and transformer-axis vocabulary</text:p>
      <text:p text:style-name="TOC2">2.2  Public naming rules</text:p>
      <text:p text:style-name="TOC2">2.3  Compatibility aliases</text:p>
      <text:p text:style-name="TOC1">3  Basis Families and Compact Orders</text:p>
      <text:p text:style-name="TOC2">3.1  Basis family requirements</text:p>
      <text:p text:style-name="TOC2">3.2  Compact order symbols</text:p>
      <text:p text:style-name="TOC2">3.3  Basis identity requirements</text:p>
      <text:p text:style-name="TOC1">4  Geometry Base Options</text:p>
      <text:p text:style-name="TOC2">4.1  Base-option resolver table</text:p>
      <text:p text:style-name="TOC2">4.2  Interpretation of compressed and whole axes</text:p>
      <text:p text:style-name="TOC1">5  Geometry Presets</text:p>
      <text:p text:style-name="TOC2">5.1  Preset resolver table</text:p>
      <text:p text:style-name="TOC2">5.2  Preset naming policy</text:p>
      <text:p text:style-name="TOC1">6  Detailed Geometry Requirements</text:p>
      <text:p text:style-name="TOC2">6.1  Dense baseline</text:p>
      <text:p text:style-name="TOC2">6.2  Depth geometry</text:p>
      <text:p text:style-name="TOC2">6.3  Generic sheet geometries</text:p>
      <text:p text:style-name="TOC2">6.4  Block geometries</text:p>
      <text:p text:style-name="TOC2">6.5  Semantic MLP sheet</text:p>
      <text:p text:style-name="TOC2">6.6  Semantic attention sheets</text:p>
      <text:p text:style-name="TOC1">7  Configuration and Model Identity</text:p>
      <text:p text:style-name="TOC2">7.1  Required identity fields</text:p>
      <text:p text:style-name="TOC2">7.2  Preset resolution requirements</text:p>
      <text:p text:style-name="TOC1">8  Out of Scope</text:p>
      <text:p text:style-name="PageBreak"/>
      <text:h text:style-name="Heading_20_1" text:outline-level="1">1 Concept and Architecture</text:h>
      <text:h text:style-name="Heading_20_2" text:outline-level="2">1.1 Architectural idea</text:h>
      <text:p text:style-name="Body">THOG2 is a compact-geometry variant of a GPT-style transformer. Its central architectural move is to stop treating the repeated weight matrices in successive transformer layers as unrelated dense objects. Instead, THOG2 treats a repeated matrix family across depth as a structured learned object. The learned object is smaller than the dense-equivalent stack, but it can still generate or act as the layer-specific matrices needed by the ordinary transformer computation.</text:p>
      <text:p text:style-name="Body">This is not a post-training compression scheme. The compact representation is the trainable representation. The model learns coefficient tensors over selected basis axes, and those coefficient tensors define the model class. When dense-equivalent weights are materialised for execution, that materialisation is an implementation boundary, not the conceptual source of the parameters.</text:p>
      <text:p text:style-name="Body">The architecture keeps the familiar nanoGPT boundary intact. Token IDs are still categorical. Token embedding and positional embedding still produce residual-stream vectors. The transformer still alternates attention, MLP, residual paths, and normalisation in the usual broad shape. THOG2 changes how repeated linear maps are parameterised across layers; it does not require the input sequence itself to be converted into Chebyshev space.</text:p>
      <text:h text:style-name="Heading_20_2" text:outline-level="2">1.2 Transformer boundary and token interface</text:h>
      <text:p text:style-name="Body">The interface between token space and compact weight space is deliberately conservative. Tokens enter through the standard embedding path. The residual stream remains an ordinary dense activation vector at each sequence position. Compact bases apply to learned weights, not to token IDs or to a new spectral representation of the input sequence.</text:p>
      <text:p text:style-name="Body">Position must still be represented. THOG2 does not remove positional information or assume that depth geometry can substitute for sequence position. Positional embedding or its successor remains part of the ordinary GPT input stack. The compact-weight machinery begins at the repeated transformer matrix families.</text:p>
      <text:h text:style-name="Heading_20_2" text:outline-level="2">1.3 Depth as the primary compact axis</text:h>
      <text:p text:style-name="Body">Depth is the privileged axis in THOG2. Across a stack of transformer blocks, corresponding matrix families are repeated in a way that makes layer index a natural ordered dimension. That depth dimension is therefore the first and most important candidate for compact basis representation.</text:p>
      <text:p text:style-name="Body">The early sheet idea uses depth as one axis of a two-dimensional learned sheet. The later block idea uses depth as one axis of a three-dimensional learned block. The new semantic sheet ladder keeps the same principle: depth remains one compressed axis, while the second compressed axis is chosen according to the semantics of the matrix family being parameterised.</text:p>
      <text:h text:style-name="Heading_20_2" text:outline-level="2">1.4 Whole axes versus compressed axes</text:h>
      <text:p text:style-name="Body">Every compact geometry in this specification can be understood by asking a simple question: which axes are compressed by a basis, and which axes are left whole as explicit indices? A compressed axis is represented by a finite basis order, such as a Chebyshev order. A whole axis remains a normal discrete index in the coefficient tensor; no smoothness, sharing, or interpolation is imposed across that axis.</text:p>
      <text:p text:style-name="Body">This vocabulary is important because not every tensor dimension deserves to be treated as a smooth geometric dimension. Transformer depth has a natural order. The residual d_model channel axis is at least plausible as a compressible basis axis for these experiments. QKV role and attention head index are categorical. Smearing across those categorical axes is not a principled default.</text:p>
      <text:p text:style-name="Body">Two-dimensional sheets are less restrictive than three-dimensional blocks because they compress depth and one matrix axis while leaving the other relevant matrix axis whole. Blocks compress depth and two matrix axes together. Blocks can be much more compact, but they also impose a stronger factorised structure. The semantic sheet ladder exists because that additional block constraint may be the wrong first abstraction for some transformer subfamilies.</text:p>
      <text:h text:style-name="Heading_20_2" text:outline-level="2">1.5 Geometry ladder</text:h>
      <text:p text:style-name="Body">The integrated geometry ladder begins with dense weights as the control. It then moves to depth-only compact geometry, where each scalar matrix weight has a learned trajectory over depth. Generic sheet geometries compress depth and one matrix axis. Block geometries compress depth and two clean matrix axes. Semantic sheet geometries return to the sheet principle but choose the second sheet axis with transformer semantics in mind.</text:p>
      <text:p text:style-name="Body">The resulting design keeps the user interface simple by exposing short flat presets. Internally, however, presets resolve to components for MLP, QKV, and attention output. This keeps ordinary runs readable while preserving clean ablations.</text:p>
      <text:h text:style-name="Heading_20_1" text:outline-level="1">2 Vocabulary, Axes, and Naming</text:h>
      <text:h text:style-name="Heading_20_2" text:outline-level="2">2.1 Matrix and transformer-axis vocabulary</text:h>
      <text:p text:style-name="Req"><text:span text:style-name="Bold">2.1.1</text:span>  A linear matrix shall be described in the convention W[out_features, in_features].</text:p>
      <text:p text:style-name="Req"><text:span text:style-name="Bold">2.1.2</text:span>  An output row shall mean one row of W and shall be interpreted as the recipe that produces one output channel.</text:p>
      <text:p text:style-name="Req"><text:span text:style-name="Bold">2.1.3</text:span>  An input column shall mean one column of W and shall be interpreted as one input channel as read across output rows.</text:p>
      <text:p text:style-name="Req"><text:span text:style-name="Bold">2.1.4</text:span>  The semantic MLP axes shall be hidden_channel, d_model_input, and d_model_output.</text:p>
      <text:p text:style-name="Req"><text:span text:style-name="Bold">2.1.5</text:span>  The semantic attention axes shall be qkv_role, head, local_head_channel, d_model_input, and d_model_output.</text:p>
      <table:table table:name="Table">
        <table:table-column table:number-columns-repeated="3"/>
        <table:table-row>
          <table:table-cell table:style-name="HeaderCell" office:value-type="string">
            <text:p text:style-name="TableHeader">Axis</text:p>
          </table:table-cell>
          <table:table-cell table:style-name="HeaderCell" office:value-type="string">
            <text:p text:style-name="TableHeader">Meaning</text:p>
          </table:table-cell>
          <table:table-cell table:style-name="HeaderCell" office:value-type="string">
            <text:p text:style-name="TableHeader">Requirement note</text:p>
          </table:table-cell>
        </table:table-row>
        <table:table-row>
          <table:table-cell table:style-name="BodyCell" office:value-type="string">
            <text:p text:style-name="TableText">depth</text:p>
          </table:table-cell>
          <table:table-cell table:style-name="BodyCell" office:value-type="string">
            <text:p text:style-name="TableText">Layer index across the repeated transformer stack.</text:p>
          </table:table-cell>
          <table:table-cell table:style-name="BodyCell" office:value-type="string">
            <text:p text:style-name="TableText">Normally compressed by P.</text:p>
          </table:table-cell>
        </table:table-row>
        <table:table-row>
          <table:table-cell table:style-name="BodyCell" office:value-type="string">
            <text:p text:style-name="TableText">output_rows</text:p>
          </table:table-cell>
          <table:table-cell table:style-name="BodyCell" office:value-type="string">
            <text:p text:style-name="TableText">Rows of W[out,in];<text:line-break/>each row produces an output feature.</text:p>
          </table:table-cell>
          <table:table-cell table:style-name="BodyCell" office:value-type="string">
            <text:p text:style-name="TableText">Whole in generic_sheet_col.</text:p>
          </table:table-cell>
        </table:table-row>
        <table:table-row>
          <table:table-cell table:style-name="BodyCell" office:value-type="string">
            <text:p text:style-name="TableText">input_cols</text:p>
          </table:table-cell>
          <table:table-cell table:style-name="BodyCell" office:value-type="string">
            <text:p text:style-name="TableText">Columns of W[out,in];<text:line-break/>each column corresponds to an input feature.</text:p>
          </table:table-cell>
          <table:table-cell table:style-name="BodyCell" office:value-type="string">
            <text:p text:style-name="TableText">Compressed in generic_sheet_col.</text:p>
          </table:table-cell>
        </table:table-row>
        <table:table-row>
          <table:table-cell table:style-name="BodyCell" office:value-type="string">
            <text:p text:style-name="TableText">d_model_input</text:p>
          </table:table-cell>
          <table:table-cell table:style-name="BodyCell" office:value-type="string">
            <text:p text:style-name="TableText">Residual-stream channel axis read by a projection.</text:p>
          </table:table-cell>
          <table:table-cell table:style-name="BodyCell" office:value-type="string">
            <text:p text:style-name="TableText">Compressible in generic, MLP, and QKV sheets.</text:p>
          </table:table-cell>
        </table:table-row>
        <table:table-row>
          <table:table-cell table:style-name="BodyCell" office:value-type="string">
            <text:p text:style-name="TableText">d_model_output</text:p>
          </table:table-cell>
          <table:table-cell table:style-name="BodyCell" office:value-type="string">
            <text:p text:style-name="TableText">Residual-stream channel axis produced by a projection.</text:p>
          </table:table-cell>
          <table:table-cell table:style-name="BodyCell" office:value-type="string">
            <text:p text:style-name="TableText">Compressible in attn_out_dmodel.</text:p>
          </table:table-cell>
        </table:table-row>
        <table:table-row>
          <table:table-cell table:style-name="BodyCell" office:value-type="string">
            <text:p text:style-name="TableText">hidden_channel</text:p>
          </table:table-cell>
          <table:table-cell table:style-name="BodyCell" office:value-type="string">
            <text:p text:style-name="TableText">MLP intermediate channel.</text:p>
          </table:table-cell>
          <table:table-cell table:style-name="BodyCell" office:value-type="string">
            <text:p text:style-name="TableText">Whole in semantic MLP sheet.</text:p>
          </table:table-cell>
        </table:table-row>
        <table:table-row>
          <table:table-cell table:style-name="BodyCell" office:value-type="string">
            <text:p text:style-name="TableText">qkv_role</text:p>
          </table:table-cell>
          <table:table-cell table:style-name="BodyCell" office:value-type="string">
            <text:p text:style-name="TableText">Query, key, or value role.</text:p>
          </table:table-cell>
          <table:table-cell table:style-name="BodyCell" office:value-type="string">
            <text:p text:style-name="TableText">Whole in semantic QKV sheet.</text:p>
          </table:table-cell>
        </table:table-row>
        <table:table-row>
          <table:table-cell table:style-name="BodyCell" office:value-type="string">
            <text:p text:style-name="TableText">head</text:p>
          </table:table-cell>
          <table:table-cell table:style-name="BodyCell" office:value-type="string">
            <text:p text:style-name="TableText">Attention head index.</text:p>
          </table:table-cell>
          <table:table-cell table:style-name="BodyCell" office:value-type="string">
            <text:p text:style-name="TableText">Whole in semantic attention sheet.</text:p>
          </table:table-cell>
        </table:table-row>
        <table:table-row>
          <table:table-cell table:style-name="BodyCell" office:value-type="string">
            <text:p text:style-name="TableText">local_head_channel</text:p>
          </table:table-cell>
          <table:table-cell table:style-name="BodyCell" office:value-type="string">
            <text:p text:style-name="TableText">Scalar channel inside one attention head.</text:p>
          </table:table-cell>
          <table:table-cell table:style-name="BodyCell" office:value-type="string">
            <text:p text:style-name="TableText">Whole or compressed depending on attention-output option.</text:p>
          </table:table-cell>
        </table:table-row>
      </table:table>
      <text:p text:style-name="Body"/>
      <text:h text:style-name="Heading_20_2" text:outline-level="2">2.2 Public naming rules</text:h>
      <text:p text:style-name="Req"><text:span text:style-name="Bold">2.2.1</text:span>  Public preset names shall be short, flat, and descriptive.</text:p>
      <text:p text:style-name="Req"><text:span text:style-name="Bold">2.2.2</text:span>  A normal user-facing run shall not require separate manual selection of MLP, QKV, and attention-output components.</text:p>
      <text:p text:style-name="Req"><text:span text:style-name="Bold">2.2.3</text:span>  Internal component selectors may exist, but the ordinary public interface shall expose named presets for the combinations that matter.</text:p>
      <text:p text:style-name="Req"><text:span text:style-name="Bold">2.2.4</text:span>  Names shall prefer semantic clarity over historical chronology.</text:p>
      <text:h text:style-name="Heading_20_2" text:outline-level="2">2.3 Compatibility aliases</text:h>
      <text:p text:style-name="Req"><text:span text:style-name="Bold">2.3.1</text:span>  legacy_sheet_col shall remain a compatibility alias for generic_sheet_col.</text:p>
      <text:p text:style-name="Req"><text:span text:style-name="Bold">2.3.2</text:span>  curve may remain a compatibility alias for depth where existing scripts or checkpoints require it.</text:p>
      <text:p text:style-name="Req"><text:span text:style-name="Bold">2.3.3</text:span>  The preferred public names for new documentation shall be generic_sheet_col and depth.</text:p>
      <text:h text:style-name="Heading_20_1" text:outline-level="1">3 Basis Families and Compact Orders</text:h>
      <text:h text:style-name="Heading_20_2" text:outline-level="2">3.1 Basis family requirements</text:h>
      <text:p text:style-name="Req"><text:span text:style-name="Bold">3.1.1</text:span>  CHEBY shall mean the Chebyshev first-kind compact basis family.</text:p>
      <text:p text:style-name="Req"><text:span text:style-name="Bold">3.1.2</text:span>  CHEBY shall use the finite sampled, QR-stabilised basis convention unless superseded by a later specification.</text:p>
      <text:p text:style-name="Req"><text:span text:style-name="Bold">3.1.3</text:span>  DCT shall mean a real orthonormal DCT basis family, initially corresponding to DCT-II orthonormal basis columns.</text:p>
      <text:p text:style-name="Req"><text:span text:style-name="Bold">3.1.4</text:span>  Geometry requirements shall be independent of basis family. A geometry specifies axes and coefficient layout; a basis family specifies how compressed axes are evaluated.</text:p>
      <text:p text:style-name="Req"><text:span text:style-name="Bold">3.1.5</text:span>  Future orthogonal basis families shall be addable without redefining the geometry ladder.</text:p>
      <text:h text:style-name="Heading_20_2" text:outline-level="2">3.2 Compact order symbols</text:h>
      <table:table table:name="Table">
        <table:table-column table:number-columns-repeated="3"/>
        <table:table-row>
          <table:table-cell table:style-name="HeaderCell" office:value-type="string">
            <text:p text:style-name="TableHeader">Symbol</text:p>
          </table:table-cell>
          <table:table-cell table:style-name="HeaderCell" office:value-type="string">
            <text:p text:style-name="TableHeader">Name</text:p>
          </table:table-cell>
          <table:table-cell table:style-name="HeaderCell" office:value-type="string">
            <text:p text:style-name="TableHeader">Meaning</text:p>
          </table:table-cell>
        </table:table-row>
        <table:table-row>
          <table:table-cell table:style-name="BodyCell" office:value-type="string">
            <text:p text:style-name="TableText">P</text:p>
          </table:table-cell>
          <table:table-cell table:style-name="BodyCell" office:value-type="string">
            <text:p text:style-name="TableText">depth order</text:p>
          </table:table-cell>
          <table:table-cell table:style-name="BodyCell" office:value-type="string">
            <text:p text:style-name="TableText">Number of retained basis functions along transformer depth.</text:p>
          </table:table-cell>
        </table:table-row>
        <table:table-row>
          <table:table-cell table:style-name="BodyCell" office:value-type="string">
            <text:p text:style-name="TableText">Q</text:p>
          </table:table-cell>
          <table:table-cell table:style-name="BodyCell" office:value-type="string">
            <text:p text:style-name="TableText">generic / d_model order</text:p>
          </table:table-cell>
          <table:table-cell table:style-name="BodyCell" office:value-type="string">
            <text:p text:style-name="TableText">Generic matrix-axis order, usually used for d_model or generic row/column compression.</text:p>
          </table:table-cell>
        </table:table-row>
        <table:table-row>
          <table:table-cell table:style-name="BodyCell" office:value-type="string">
            <text:p text:style-name="TableText">J</text:p>
          </table:table-cell>
          <table:table-cell table:style-name="BodyCell" office:value-type="string">
            <text:p text:style-name="TableText">QKV local order</text:p>
          </table:table-cell>
          <table:table-cell table:style-name="BodyCell" office:value-type="string">
            <text:p text:style-name="TableText">Per-head local-channel order where QKV local compression is used.</text:p>
          </table:table-cell>
        </table:table-row>
        <table:table-row>
          <table:table-cell table:style-name="BodyCell" office:value-type="string">
            <text:p text:style-name="TableText">O</text:p>
          </table:table-cell>
          <table:table-cell table:style-name="BodyCell" office:value-type="string">
            <text:p text:style-name="TableText">attention-output local order</text:p>
          </table:table-cell>
          <table:table-cell table:style-name="BodyCell" office:value-type="string">
            <text:p text:style-name="TableText">Attention-output local-channel order where applicable.</text:p>
          </table:table-cell>
        </table:table-row>
        <table:table-row>
          <table:table-cell table:style-name="BodyCell" office:value-type="string">
            <text:p text:style-name="TableText">X</text:p>
          </table:table-cell>
          <table:table-cell table:style-name="BodyCell" office:value-type="string">
            <text:p text:style-name="TableText">MLP d_model order</text:p>
          </table:table-cell>
          <table:table-cell table:style-name="BodyCell" office:value-type="string">
            <text:p text:style-name="TableText">MLP-specific retained order for d_model axes.</text:p>
          </table:table-cell>
        </table:table-row>
        <table:table-row>
          <table:table-cell table:style-name="BodyCell" office:value-type="string">
            <text:p text:style-name="TableText">Y</text:p>
          </table:table-cell>
          <table:table-cell table:style-name="BodyCell" office:value-type="string">
            <text:p text:style-name="TableText">MLP hidden order</text:p>
          </table:table-cell>
          <table:table-cell table:style-name="BodyCell" office:value-type="string">
            <text:p text:style-name="TableText">MLP-specific retained order for hidden axes in block-style geometries.</text:p>
          </table:table-cell>
        </table:table-row>
      </table:table>
      <text:p text:style-name="Body"/>
      <text:p text:style-name="Req"><text:span text:style-name="Bold">3.2.1</text:span>  A geometry shall state which compact orders it consumes.</text:p>
      <text:p text:style-name="Req"><text:span text:style-name="Bold">3.2.2</text:span>  Unused compact-order knobs shall not silently change the identity of a geometry that does not consume them.</text:p>
      <text:h text:style-name="Heading_20_2" text:outline-level="2">3.3 Basis identity requirements</text:h>
      <text:p text:style-name="Req"><text:span text:style-name="Bold">3.3.1</text:span>  Model identity shall include basis_family and basis_version.</text:p>
      <text:p text:style-name="Req"><text:span text:style-name="Bold">3.3.2</text:span>  Model identity shall include resolved compact orders for every compressed axis used by the selected geometry.</text:p>
      <text:p text:style-name="Req"><text:span text:style-name="Bold">3.3.3</text:span>  A checkpoint or manifest shall not require the reader to infer the basis family from parameter shape alone.</text:p>
      <text:h text:style-name="Heading_20_1" text:outline-level="1">4 Geometry Base Options</text:h>
      <text:h text:style-name="Heading_20_2" text:outline-level="2">4.1 Base-option resolver table</text:h>
      <text:p text:style-name="Body">The following table expands the base-option view to include the existing geometries and the new semantic sheet components. Some entries are complete whole-model geometries. Some are module-level components used to form presets. full_block is included here for completeness even though it is structurally a composite preset rather than an atomic base component.</text:p>
      <table:table table:name="Table">
        <table:table-column table:number-columns-repeated="7"/>
        <table:table-row>
          <table:table-cell table:style-name="HeaderCell" office:value-type="string">
            <text:p text:style-name="TableHeader">#</text:p>
          </table:table-cell>
          <table:table-cell table:style-name="HeaderCell" office:value-type="string">
            <text:p text:style-name="TableHeader">Base option</text:p>
          </table:table-cell>
          <table:table-cell table:style-name="HeaderCell" office:value-type="string">
            <text:p text:style-name="TableHeader">Applies to</text:p>
          </table:table-cell>
          <table:table-cell table:style-name="HeaderCell" office:value-type="string">
            <text:p text:style-name="TableHeader">Brief description</text:p>
          </table:table-cell>
          <table:table-cell table:style-name="HeaderCell" office:value-type="string">
            <text:p text:style-name="TableHeader">Compressed axes</text:p>
          </table:table-cell>
          <table:table-cell table:style-name="HeaderCell" office:value-type="string">
            <text:p text:style-name="TableHeader">Whole axes</text:p>
          </table:table-cell>
          <table:table-cell table:style-name="HeaderCell" office:value-type="string">
            <text:p text:style-name="TableHeader">Status</text:p>
          </table:table-cell>
        </table:table-row>
        <table:table-row>
          <table:table-cell table:style-name="BodyCell" office:value-type="string">
            <text:p text:style-name="TableText">1</text:p>
          </table:table-cell>
          <table:table-cell table:style-name="BodyCell" office:value-type="string">
            <text:p text:style-name="TableText">dense</text:p>
          </table:table-cell>
          <table:table-cell table:style-name="BodyCell" office:value-type="string">
            <text:p text:style-name="TableText">all families</text:p>
          </table:table-cell>
          <table:table-cell table:style-name="BodyCell" office:value-type="string">
            <text:p text:style-name="TableText">Conventional repeated dense transformer weights.</text:p>
          </table:table-cell>
          <table:table-cell table:style-name="BodyCell" office:value-type="string">
            <text:p text:style-name="TableText">none</text:p>
          </table:table-cell>
          <table:table-cell table:style-name="BodyCell" office:value-type="string">
            <text:p text:style-name="TableText">all matrix axes and all layer-specific weights</text:p>
          </table:table-cell>
          <table:table-cell table:style-name="BodyCell" office:value-type="string">
            <text:p text:style-name="TableText">existing baseline</text:p>
          </table:table-cell>
        </table:table-row>
        <table:table-row>
          <table:table-cell table:style-name="BodyCell" office:value-type="string">
            <text:p text:style-name="TableText">2</text:p>
          </table:table-cell>
          <table:table-cell table:style-name="BodyCell" office:value-type="string">
            <text:p text:style-name="TableText">depth</text:p>
          </table:table-cell>
          <table:table-cell table:style-name="BodyCell" office:value-type="string">
            <text:p text:style-name="TableText">all families</text:p>
          </table:table-cell>
          <table:table-cell table:style-name="BodyCell" office:value-type="string">
            <text:p text:style-name="TableText">Depth-only compact geometry;<text:line-break/>preferred name for curve.</text:p>
          </table:table-cell>
          <table:table-cell table:style-name="BodyCell" office:value-type="string">
            <text:p text:style-name="TableText">depth</text:p>
          </table:table-cell>
          <table:table-cell table:style-name="BodyCell" office:value-type="string">
            <text:p text:style-name="TableText">output_rows, input_cols</text:p>
          </table:table-cell>
          <table:table-cell table:style-name="BodyCell" office:value-type="string">
            <text:p text:style-name="TableText">existing</text:p>
          </table:table-cell>
        </table:table-row>
        <table:table-row>
          <table:table-cell table:style-name="BodyCell" office:value-type="string">
            <text:p text:style-name="TableText">3</text:p>
          </table:table-cell>
          <table:table-cell table:style-name="BodyCell" office:value-type="string">
            <text:p text:style-name="TableText">curve</text:p>
          </table:table-cell>
          <table:table-cell table:style-name="BodyCell" office:value-type="string">
            <text:p text:style-name="TableText">all families</text:p>
          </table:table-cell>
          <table:table-cell table:style-name="BodyCell" office:value-type="string">
            <text:p text:style-name="TableText">Compatibility alias for depth.</text:p>
          </table:table-cell>
          <table:table-cell table:style-name="BodyCell" office:value-type="string">
            <text:p text:style-name="TableText">depth</text:p>
          </table:table-cell>
          <table:table-cell table:style-name="BodyCell" office:value-type="string">
            <text:p text:style-name="TableText">output_rows, input_cols</text:p>
          </table:table-cell>
          <table:table-cell table:style-name="BodyCell" office:value-type="string">
            <text:p text:style-name="TableText">existing alias</text:p>
          </table:table-cell>
        </table:table-row>
        <table:table-row>
          <table:table-cell table:style-name="BodyCell" office:value-type="string">
            <text:p text:style-name="TableText">4</text:p>
          </table:table-cell>
          <table:table-cell table:style-name="BodyCell" office:value-type="string">
            <text:p text:style-name="TableText">generic_sheet_col</text:p>
          </table:table-cell>
          <table:table-cell table:style-name="BodyCell" office:value-type="string">
            <text:p text:style-name="TableText">all families</text:p>
          </table:table-cell>
          <table:table-cell table:style-name="BodyCell" office:value-type="string">
            <text:p text:style-name="TableText">Original sheet-column behaviour under clearer name.</text:p>
          </table:table-cell>
          <table:table-cell table:style-name="BodyCell" office:value-type="string">
            <text:p text:style-name="TableText">depth, input_cols</text:p>
          </table:table-cell>
          <table:table-cell table:style-name="BodyCell" office:value-type="string">
            <text:p text:style-name="TableText">output_rows</text:p>
          </table:table-cell>
          <table:table-cell table:style-name="BodyCell" office:value-type="string">
            <text:p text:style-name="TableText">new preferred name</text:p>
          </table:table-cell>
        </table:table-row>
        <table:table-row>
          <table:table-cell table:style-name="BodyCell" office:value-type="string">
            <text:p text:style-name="TableText">5</text:p>
          </table:table-cell>
          <table:table-cell table:style-name="BodyCell" office:value-type="string">
            <text:p text:style-name="TableText">legacy_sheet_col</text:p>
          </table:table-cell>
          <table:table-cell table:style-name="BodyCell" office:value-type="string">
            <text:p text:style-name="TableText">all families</text:p>
          </table:table-cell>
          <table:table-cell table:style-name="BodyCell" office:value-type="string">
            <text:p text:style-name="TableText">Compatibility alias for generic_sheet_col.</text:p>
          </table:table-cell>
          <table:table-cell table:style-name="BodyCell" office:value-type="string">
            <text:p text:style-name="TableText">depth, input_cols</text:p>
          </table:table-cell>
          <table:table-cell table:style-name="BodyCell" office:value-type="string">
            <text:p text:style-name="TableText">output_rows</text:p>
          </table:table-cell>
          <table:table-cell table:style-name="BodyCell" office:value-type="string">
            <text:p text:style-name="TableText">existing alias</text:p>
          </table:table-cell>
        </table:table-row>
        <table:table-row>
          <table:table-cell table:style-name="BodyCell" office:value-type="string">
            <text:p text:style-name="TableText">6</text:p>
          </table:table-cell>
          <table:table-cell table:style-name="BodyCell" office:value-type="string">
            <text:p text:style-name="TableText">generic_sheet_row</text:p>
          </table:table-cell>
          <table:table-cell table:style-name="BodyCell" office:value-type="string">
            <text:p text:style-name="TableText">all families</text:p>
          </table:table-cell>
          <table:table-cell table:style-name="BodyCell" office:value-type="string">
            <text:p text:style-name="TableText">Transposed generic sheet ablation.</text:p>
          </table:table-cell>
          <table:table-cell table:style-name="BodyCell" office:value-type="string">
            <text:p text:style-name="TableText">depth, output_rows</text:p>
          </table:table-cell>
          <table:table-cell table:style-name="BodyCell" office:value-type="string">
            <text:p text:style-name="TableText">input_cols</text:p>
          </table:table-cell>
          <table:table-cell table:style-name="BodyCell" office:value-type="string">
            <text:p text:style-name="TableText">new</text:p>
          </table:table-cell>
        </table:table-row>
        <table:table-row>
          <table:table-cell table:style-name="BodyCell" office:value-type="string">
            <text:p text:style-name="TableText">7</text:p>
          </table:table-cell>
          <table:table-cell table:style-name="BodyCell" office:value-type="string">
            <text:p text:style-name="TableText">mlp_block</text:p>
          </table:table-cell>
          <table:table-cell table:style-name="BodyCell" office:value-type="string">
            <text:p text:style-name="TableText">MLP only</text:p>
          </table:table-cell>
          <table:table-cell table:style-name="BodyCell" office:value-type="string">
            <text:p text:style-name="TableText">Existing MLP block geometry.</text:p>
          </table:table-cell>
          <table:table-cell table:style-name="BodyCell" office:value-type="string">
            <text:p text:style-name="TableText">depth, MLP output axis, MLP input axis</text:p>
          </table:table-cell>
          <table:table-cell table:style-name="BodyCell" office:value-type="string">
            <text:p text:style-name="TableText">MLP family/direction</text:p>
          </table:table-cell>
          <table:table-cell table:style-name="BodyCell" office:value-type="string">
            <text:p text:style-name="TableText">existing</text:p>
          </table:table-cell>
        </table:table-row>
        <table:table-row>
          <table:table-cell table:style-name="BodyCell" office:value-type="string">
            <text:p text:style-name="TableText">8</text:p>
          </table:table-cell>
          <table:table-cell table:style-name="BodyCell" office:value-type="string">
            <text:p text:style-name="TableText">head_aware_block</text:p>
          </table:table-cell>
          <table:table-cell table:style-name="BodyCell" office:value-type="string">
            <text:p text:style-name="TableText">attention only</text:p>
          </table:table-cell>
          <table:table-cell table:style-name="BodyCell" office:value-type="string">
            <text:p text:style-name="TableText">Existing attention block;<text:line-break/>keeps role and head categorical.</text:p>
          </table:table-cell>
          <table:table-cell table:style-name="BodyCell" office:value-type="string">
            <text:p text:style-name="TableText">QKV: depth, local, d_model_input;<text:line-break/>out: depth, d_model_output, local</text:p>
          </table:table-cell>
          <table:table-cell table:style-name="BodyCell" office:value-type="string">
            <text:p text:style-name="TableText">QKV: qkv_role, head;<text:line-break/>out: head</text:p>
          </table:table-cell>
          <table:table-cell table:style-name="BodyCell" office:value-type="string">
            <text:p text:style-name="TableText">existing</text:p>
          </table:table-cell>
        </table:table-row>
        <table:table-row>
          <table:table-cell table:style-name="BodyCell" office:value-type="string">
            <text:p text:style-name="TableText">9</text:p>
          </table:table-cell>
          <table:table-cell table:style-name="BodyCell" office:value-type="string">
            <text:p text:style-name="TableText">full_block</text:p>
          </table:table-cell>
          <table:table-cell table:style-name="BodyCell" office:value-type="string">
            <text:p text:style-name="TableText">full model</text:p>
          </table:table-cell>
          <table:table-cell table:style-name="BodyCell" office:value-type="string">
            <text:p text:style-name="TableText">Composite of mlp_block and head_aware_block.</text:p>
          </table:table-cell>
          <table:table-cell table:style-name="BodyCell" office:value-type="string">
            <text:p text:style-name="TableText">MLP block axes;<text:line-break/>QKV/out head-aware block axes</text:p>
          </table:table-cell>
          <table:table-cell table:style-name="BodyCell" office:value-type="string">
            <text:p text:style-name="TableText">component categorical axes</text:p>
          </table:table-cell>
          <table:table-cell table:style-name="BodyCell" office:value-type="string">
            <text:p text:style-name="TableText">existing composite</text:p>
          </table:table-cell>
        </table:table-row>
        <table:table-row>
          <table:table-cell table:style-name="BodyCell" office:value-type="string">
            <text:p text:style-name="TableText">10</text:p>
          </table:table-cell>
          <table:table-cell table:style-name="BodyCell" office:value-type="string">
            <text:p text:style-name="TableText">sheet_mlp</text:p>
          </table:table-cell>
          <table:table-cell table:style-name="BodyCell" office:value-type="string">
            <text:p text:style-name="TableText">MLP only</text:p>
          </table:table-cell>
          <table:table-cell table:style-name="BodyCell" office:value-type="string">
            <text:p text:style-name="TableText">Semantic MLP sheet.</text:p>
          </table:table-cell>
          <table:table-cell table:style-name="BodyCell" office:value-type="string">
            <text:p text:style-name="TableText">depth, d_model_input/output</text:p>
          </table:table-cell>
          <table:table-cell table:style-name="BodyCell" office:value-type="string">
            <text:p text:style-name="TableText">hidden_channel</text:p>
          </table:table-cell>
          <table:table-cell table:style-name="BodyCell" office:value-type="string">
            <text:p text:style-name="TableText">new</text:p>
          </table:table-cell>
        </table:table-row>
        <table:table-row>
          <table:table-cell table:style-name="BodyCell" office:value-type="string">
            <text:p text:style-name="TableText">11</text:p>
          </table:table-cell>
          <table:table-cell table:style-name="BodyCell" office:value-type="string">
            <text:p text:style-name="TableText">sheet_qkv</text:p>
          </table:table-cell>
          <table:table-cell table:style-name="BodyCell" office:value-type="string">
            <text:p text:style-name="TableText">QKV only</text:p>
          </table:table-cell>
          <table:table-cell table:style-name="BodyCell" office:value-type="string">
            <text:p text:style-name="TableText">Semantic QKV sheet.</text:p>
          </table:table-cell>
          <table:table-cell table:style-name="BodyCell" office:value-type="string">
            <text:p text:style-name="TableText">depth, d_model_input</text:p>
          </table:table-cell>
          <table:table-cell table:style-name="BodyCell" office:value-type="string">
            <text:p text:style-name="TableText">qkv_role, head, local_head_channel</text:p>
          </table:table-cell>
          <table:table-cell table:style-name="BodyCell" office:value-type="string">
            <text:p text:style-name="TableText">new</text:p>
          </table:table-cell>
        </table:table-row>
        <table:table-row>
          <table:table-cell table:style-name="BodyCell" office:value-type="string">
            <text:p text:style-name="TableText">12</text:p>
          </table:table-cell>
          <table:table-cell table:style-name="BodyCell" office:value-type="string">
            <text:p text:style-name="TableText">sheet_out_dmodel</text:p>
          </table:table-cell>
          <table:table-cell table:style-name="BodyCell" office:value-type="string">
            <text:p text:style-name="TableText">attention output only</text:p>
          </table:table-cell>
          <table:table-cell table:style-name="BodyCell" office:value-type="string">
            <text:p text:style-name="TableText">Attention output sheet giving Q to d_model output.</text:p>
          </table:table-cell>
          <table:table-cell table:style-name="BodyCell" office:value-type="string">
            <text:p text:style-name="TableText">depth, d_model_output</text:p>
          </table:table-cell>
          <table:table-cell table:style-name="BodyCell" office:value-type="string">
            <text:p text:style-name="TableText">head, local_head_channel</text:p>
          </table:table-cell>
          <table:table-cell table:style-name="BodyCell" office:value-type="string">
            <text:p text:style-name="TableText">new</text:p>
          </table:table-cell>
        </table:table-row>
        <table:table-row>
          <table:table-cell table:style-name="BodyCell" office:value-type="string">
            <text:p text:style-name="TableText">13</text:p>
          </table:table-cell>
          <table:table-cell table:style-name="BodyCell" office:value-type="string">
            <text:p text:style-name="TableText">sheet_out_local</text:p>
          </table:table-cell>
          <table:table-cell table:style-name="BodyCell" office:value-type="string">
            <text:p text:style-name="TableText">attention output only</text:p>
          </table:table-cell>
          <table:table-cell table:style-name="BodyCell" office:value-type="string">
            <text:p text:style-name="TableText">Attention output sheet giving Q to local head channel.</text:p>
          </table:table-cell>
          <table:table-cell table:style-name="BodyCell" office:value-type="string">
            <text:p text:style-name="TableText">depth, local_head_channel</text:p>
          </table:table-cell>
          <table:table-cell table:style-name="BodyCell" office:value-type="string">
            <text:p text:style-name="TableText">d_model_output, head</text:p>
          </table:table-cell>
          <table:table-cell table:style-name="BodyCell" office:value-type="string">
            <text:p text:style-name="TableText">new</text:p>
          </table:table-cell>
        </table:table-row>
      </table:table>
      <text:p text:style-name="Body"/>
      <text:h text:style-name="Heading_20_2" text:outline-level="2">4.2 Interpretation of compressed and whole axes</text:h>
      <text:p text:style-name="Req"><text:span text:style-name="Bold">4.2.1</text:span>  For a sheet geometry, compressed axes shall define the two-dimensional sheet coordinates.</text:p>
      <text:p text:style-name="Req"><text:span text:style-name="Bold">4.2.2</text:span>  For a block geometry, compressed axes shall define the three-dimensional block coordinates.</text:p>
      <text:p text:style-name="Req"><text:span text:style-name="Bold">4.2.3</text:span>  Whole axes shall remain explicit coefficient-tensor indices and shall not be represented by a basis.</text:p>
      <text:p text:style-name="Req"><text:span text:style-name="Bold">4.2.4</text:span>  For semantic attention, qkv_role and head shall remain whole unless a later requirements version explicitly permits otherwise.</text:p>
      <text:h text:style-name="Heading_20_1" text:outline-level="1">5 Geometry Presets</text:h>
      <text:h text:style-name="Heading_20_2" text:outline-level="2">5.1 Preset resolver table</text:h>
      <text:p text:style-name="Body">The following presets are flat user-facing names. They resolve to one MLP component, one QKV component, and one attention-output component. The table deliberately includes existing presets, compatibility aliases, generic sheet variants, and the full semantic sheet ladder.</text:p>
      <table:table table:name="Table">
        <table:table-column table:number-columns-repeated="7"/>
        <table:table-row>
          <table:table-cell table:style-name="HeaderCell" office:value-type="string">
            <text:p text:style-name="TableHeader">#</text:p>
          </table:table-cell>
          <table:table-cell table:style-name="HeaderCell" office:value-type="string">
            <text:p text:style-name="TableHeader">Preset</text:p>
          </table:table-cell>
          <table:table-cell table:style-name="HeaderCell" office:value-type="string">
            <text:p text:style-name="TableHeader">MLP component</text:p>
          </table:table-cell>
          <table:table-cell table:style-name="HeaderCell" office:value-type="string">
            <text:p text:style-name="TableHeader">QKV component</text:p>
          </table:table-cell>
          <table:table-cell table:style-name="HeaderCell" office:value-type="string">
            <text:p text:style-name="TableHeader">Attn-out component</text:p>
          </table:table-cell>
          <table:table-cell table:style-name="HeaderCell" office:value-type="string">
            <text:p text:style-name="TableHeader">Purpose</text:p>
          </table:table-cell>
          <table:table-cell table:style-name="HeaderCell" office:value-type="string">
            <text:p text:style-name="TableHeader">Status</text:p>
          </table:table-cell>
        </table:table-row>
        <table:table-row>
          <table:table-cell table:style-name="BodyCell" office:value-type="string">
            <text:p text:style-name="TableText">1</text:p>
          </table:table-cell>
          <table:table-cell table:style-name="BodyCell" office:value-type="string">
            <text:p text:style-name="TableText">dense</text:p>
          </table:table-cell>
          <table:table-cell table:style-name="BodyCell" office:value-type="string">
            <text:p text:style-name="TableText">dense</text:p>
          </table:table-cell>
          <table:table-cell table:style-name="BodyCell" office:value-type="string">
            <text:p text:style-name="TableText">dense</text:p>
          </table:table-cell>
          <table:table-cell table:style-name="BodyCell" office:value-type="string">
            <text:p text:style-name="TableText">dense</text:p>
          </table:table-cell>
          <table:table-cell table:style-name="BodyCell" office:value-type="string">
            <text:p text:style-name="TableText">Conventional dense baseline.</text:p>
          </table:table-cell>
          <table:table-cell table:style-name="BodyCell" office:value-type="string">
            <text:p text:style-name="TableText">existing</text:p>
          </table:table-cell>
        </table:table-row>
        <table:table-row>
          <table:table-cell table:style-name="BodyCell" office:value-type="string">
            <text:p text:style-name="TableText">2</text:p>
          </table:table-cell>
          <table:table-cell table:style-name="BodyCell" office:value-type="string">
            <text:p text:style-name="TableText">depth</text:p>
          </table:table-cell>
          <table:table-cell table:style-name="BodyCell" office:value-type="string">
            <text:p text:style-name="TableText">depth</text:p>
          </table:table-cell>
          <table:table-cell table:style-name="BodyCell" office:value-type="string">
            <text:p text:style-name="TableText">depth</text:p>
          </table:table-cell>
          <table:table-cell table:style-name="BodyCell" office:value-type="string">
            <text:p text:style-name="TableText">depth</text:p>
          </table:table-cell>
          <table:table-cell table:style-name="BodyCell" office:value-type="string">
            <text:p text:style-name="TableText">Depth-only compact geometry.</text:p>
          </table:table-cell>
          <table:table-cell table:style-name="BodyCell" office:value-type="string">
            <text:p text:style-name="TableText">existing</text:p>
          </table:table-cell>
        </table:table-row>
        <table:table-row>
          <table:table-cell table:style-name="BodyCell" office:value-type="string">
            <text:p text:style-name="TableText">3</text:p>
          </table:table-cell>
          <table:table-cell table:style-name="BodyCell" office:value-type="string">
            <text:p text:style-name="TableText">curve</text:p>
          </table:table-cell>
          <table:table-cell table:style-name="BodyCell" office:value-type="string">
            <text:p text:style-name="TableText">depth</text:p>
          </table:table-cell>
          <table:table-cell table:style-name="BodyCell" office:value-type="string">
            <text:p text:style-name="TableText">depth</text:p>
          </table:table-cell>
          <table:table-cell table:style-name="BodyCell" office:value-type="string">
            <text:p text:style-name="TableText">depth</text:p>
          </table:table-cell>
          <table:table-cell table:style-name="BodyCell" office:value-type="string">
            <text:p text:style-name="TableText">Compatibility alias for depth.</text:p>
          </table:table-cell>
          <table:table-cell table:style-name="BodyCell" office:value-type="string">
            <text:p text:style-name="TableText">existing alias</text:p>
          </table:table-cell>
        </table:table-row>
        <table:table-row>
          <table:table-cell table:style-name="BodyCell" office:value-type="string">
            <text:p text:style-name="TableText">4</text:p>
          </table:table-cell>
          <table:table-cell table:style-name="BodyCell" office:value-type="string">
            <text:p text:style-name="TableText">generic_sheet_col</text:p>
          </table:table-cell>
          <table:table-cell table:style-name="BodyCell" office:value-type="string">
            <text:p text:style-name="TableText">generic_sheet_col</text:p>
          </table:table-cell>
          <table:table-cell table:style-name="BodyCell" office:value-type="string">
            <text:p text:style-name="TableText">generic_sheet_col</text:p>
          </table:table-cell>
          <table:table-cell table:style-name="BodyCell" office:value-type="string">
            <text:p text:style-name="TableText">generic_sheet_col</text:p>
          </table:table-cell>
          <table:table-cell table:style-name="BodyCell" office:value-type="string">
            <text:p text:style-name="TableText">Preferred name for original sheet-column behaviour.</text:p>
          </table:table-cell>
          <table:table-cell table:style-name="BodyCell" office:value-type="string">
            <text:p text:style-name="TableText">new preferred name</text:p>
          </table:table-cell>
        </table:table-row>
        <table:table-row>
          <table:table-cell table:style-name="BodyCell" office:value-type="string">
            <text:p text:style-name="TableText">5</text:p>
          </table:table-cell>
          <table:table-cell table:style-name="BodyCell" office:value-type="string">
            <text:p text:style-name="TableText">legacy_sheet_col</text:p>
          </table:table-cell>
          <table:table-cell table:style-name="BodyCell" office:value-type="string">
            <text:p text:style-name="TableText">generic_sheet_col</text:p>
          </table:table-cell>
          <table:table-cell table:style-name="BodyCell" office:value-type="string">
            <text:p text:style-name="TableText">generic_sheet_col</text:p>
          </table:table-cell>
          <table:table-cell table:style-name="BodyCell" office:value-type="string">
            <text:p text:style-name="TableText">generic_sheet_col</text:p>
          </table:table-cell>
          <table:table-cell table:style-name="BodyCell" office:value-type="string">
            <text:p text:style-name="TableText">Compatibility alias for generic_sheet_col.</text:p>
          </table:table-cell>
          <table:table-cell table:style-name="BodyCell" office:value-type="string">
            <text:p text:style-name="TableText">existing alias</text:p>
          </table:table-cell>
        </table:table-row>
        <table:table-row>
          <table:table-cell table:style-name="BodyCell" office:value-type="string">
            <text:p text:style-name="TableText">6</text:p>
          </table:table-cell>
          <table:table-cell table:style-name="BodyCell" office:value-type="string">
            <text:p text:style-name="TableText">generic_sheet_row</text:p>
          </table:table-cell>
          <table:table-cell table:style-name="BodyCell" office:value-type="string">
            <text:p text:style-name="TableText">generic_sheet_row</text:p>
          </table:table-cell>
          <table:table-cell table:style-name="BodyCell" office:value-type="string">
            <text:p text:style-name="TableText">generic_sheet_row</text:p>
          </table:table-cell>
          <table:table-cell table:style-name="BodyCell" office:value-type="string">
            <text:p text:style-name="TableText">generic_sheet_row</text:p>
          </table:table-cell>
          <table:table-cell table:style-name="BodyCell" office:value-type="string">
            <text:p text:style-name="TableText">Whole-model transposed generic sheet ablation.</text:p>
          </table:table-cell>
          <table:table-cell table:style-name="BodyCell" office:value-type="string">
            <text:p text:style-name="TableText">new</text:p>
          </table:table-cell>
        </table:table-row>
        <table:table-row>
          <table:table-cell table:style-name="BodyCell" office:value-type="string">
            <text:p text:style-name="TableText">7</text:p>
          </table:table-cell>
          <table:table-cell table:style-name="BodyCell" office:value-type="string">
            <text:p text:style-name="TableText">mlp_block</text:p>
          </table:table-cell>
          <table:table-cell table:style-name="BodyCell" office:value-type="string">
            <text:p text:style-name="TableText">mlp_block</text:p>
          </table:table-cell>
          <table:table-cell table:style-name="BodyCell" office:value-type="string">
            <text:p text:style-name="TableText">depth</text:p>
          </table:table-cell>
          <table:table-cell table:style-name="BodyCell" office:value-type="string">
            <text:p text:style-name="TableText">depth</text:p>
          </table:table-cell>
          <table:table-cell table:style-name="BodyCell" office:value-type="string">
            <text:p text:style-name="TableText">Existing MLP block preset;<text:line-break/>attention depth-only.</text:p>
          </table:table-cell>
          <table:table-cell table:style-name="BodyCell" office:value-type="string">
            <text:p text:style-name="TableText">existing</text:p>
          </table:table-cell>
        </table:table-row>
        <table:table-row>
          <table:table-cell table:style-name="BodyCell" office:value-type="string">
            <text:p text:style-name="TableText">8</text:p>
          </table:table-cell>
          <table:table-cell table:style-name="BodyCell" office:value-type="string">
            <text:p text:style-name="TableText">head_aware_block</text:p>
          </table:table-cell>
          <table:table-cell table:style-name="BodyCell" office:value-type="string">
            <text:p text:style-name="TableText">depth</text:p>
          </table:table-cell>
          <table:table-cell table:style-name="BodyCell" office:value-type="string">
            <text:p text:style-name="TableText">head_aware_block</text:p>
          </table:table-cell>
          <table:table-cell table:style-name="BodyCell" office:value-type="string">
            <text:p text:style-name="TableText">head_aware_block</text:p>
          </table:table-cell>
          <table:table-cell table:style-name="BodyCell" office:value-type="string">
            <text:p text:style-name="TableText">Existing attention block preset;<text:line-break/>MLP depth-only.</text:p>
          </table:table-cell>
          <table:table-cell table:style-name="BodyCell" office:value-type="string">
            <text:p text:style-name="TableText">existing</text:p>
          </table:table-cell>
        </table:table-row>
        <table:table-row>
          <table:table-cell table:style-name="BodyCell" office:value-type="string">
            <text:p text:style-name="TableText">9</text:p>
          </table:table-cell>
          <table:table-cell table:style-name="BodyCell" office:value-type="string">
            <text:p text:style-name="TableText">full_block</text:p>
          </table:table-cell>
          <table:table-cell table:style-name="BodyCell" office:value-type="string">
            <text:p text:style-name="TableText">mlp_block</text:p>
          </table:table-cell>
          <table:table-cell table:style-name="BodyCell" office:value-type="string">
            <text:p text:style-name="TableText">head_aware_block</text:p>
          </table:table-cell>
          <table:table-cell table:style-name="BodyCell" office:value-type="string">
            <text:p text:style-name="TableText">head_aware_block</text:p>
          </table:table-cell>
          <table:table-cell table:style-name="BodyCell" office:value-type="string">
            <text:p text:style-name="TableText">Existing full block preset.</text:p>
          </table:table-cell>
          <table:table-cell table:style-name="BodyCell" office:value-type="string">
            <text:p text:style-name="TableText">existing</text:p>
          </table:table-cell>
        </table:table-row>
        <table:table-row>
          <table:table-cell table:style-name="BodyCell" office:value-type="string">
            <text:p text:style-name="TableText">10</text:p>
          </table:table-cell>
          <table:table-cell table:style-name="BodyCell" office:value-type="string">
            <text:p text:style-name="TableText">sheet_mlp</text:p>
          </table:table-cell>
          <table:table-cell table:style-name="BodyCell" office:value-type="string">
            <text:p text:style-name="TableText">sheet_mlp</text:p>
          </table:table-cell>
          <table:table-cell table:style-name="BodyCell" office:value-type="string">
            <text:p text:style-name="TableText">generic_sheet_col</text:p>
          </table:table-cell>
          <table:table-cell table:style-name="BodyCell" office:value-type="string">
            <text:p text:style-name="TableText">generic_sheet_col</text:p>
          </table:table-cell>
          <table:table-cell table:style-name="BodyCell" office:value-type="string">
            <text:p text:style-name="TableText">Semantic MLP only;<text:line-break/>attention generic.</text:p>
          </table:table-cell>
          <table:table-cell table:style-name="BodyCell" office:value-type="string">
            <text:p text:style-name="TableText">new</text:p>
          </table:table-cell>
        </table:table-row>
        <table:table-row>
          <table:table-cell table:style-name="BodyCell" office:value-type="string">
            <text:p text:style-name="TableText">11</text:p>
          </table:table-cell>
          <table:table-cell table:style-name="BodyCell" office:value-type="string">
            <text:p text:style-name="TableText">sheet_qkv</text:p>
          </table:table-cell>
          <table:table-cell table:style-name="BodyCell" office:value-type="string">
            <text:p text:style-name="TableText">generic_sheet_col</text:p>
          </table:table-cell>
          <table:table-cell table:style-name="BodyCell" office:value-type="string">
            <text:p text:style-name="TableText">sheet_qkv</text:p>
          </table:table-cell>
          <table:table-cell table:style-name="BodyCell" office:value-type="string">
            <text:p text:style-name="TableText">generic_sheet_col</text:p>
          </table:table-cell>
          <table:table-cell table:style-name="BodyCell" office:value-type="string">
            <text:p text:style-name="TableText">Semantic QKV only.</text:p>
          </table:table-cell>
          <table:table-cell table:style-name="BodyCell" office:value-type="string">
            <text:p text:style-name="TableText">new</text:p>
          </table:table-cell>
        </table:table-row>
        <table:table-row>
          <table:table-cell table:style-name="BodyCell" office:value-type="string">
            <text:p text:style-name="TableText">12</text:p>
          </table:table-cell>
          <table:table-cell table:style-name="BodyCell" office:value-type="string">
            <text:p text:style-name="TableText">sheet_out_dmodel</text:p>
          </table:table-cell>
          <table:table-cell table:style-name="BodyCell" office:value-type="string">
            <text:p text:style-name="TableText">generic_sheet_col</text:p>
          </table:table-cell>
          <table:table-cell table:style-name="BodyCell" office:value-type="string">
            <text:p text:style-name="TableText">generic_sheet_col</text:p>
          </table:table-cell>
          <table:table-cell table:style-name="BodyCell" office:value-type="string">
            <text:p text:style-name="TableText">sheet_out_dmodel</text:p>
          </table:table-cell>
          <table:table-cell table:style-name="BodyCell" office:value-type="string">
            <text:p text:style-name="TableText">Semantic attention output only, d_model version.</text:p>
          </table:table-cell>
          <table:table-cell table:style-name="BodyCell" office:value-type="string">
            <text:p text:style-name="TableText">new</text:p>
          </table:table-cell>
        </table:table-row>
        <table:table-row>
          <table:table-cell table:style-name="BodyCell" office:value-type="string">
            <text:p text:style-name="TableText">13</text:p>
          </table:table-cell>
          <table:table-cell table:style-name="BodyCell" office:value-type="string">
            <text:p text:style-name="TableText">sheet_out_local</text:p>
          </table:table-cell>
          <table:table-cell table:style-name="BodyCell" office:value-type="string">
            <text:p text:style-name="TableText">generic_sheet_col</text:p>
          </table:table-cell>
          <table:table-cell table:style-name="BodyCell" office:value-type="string">
            <text:p text:style-name="TableText">generic_sheet_col</text:p>
          </table:table-cell>
          <table:table-cell table:style-name="BodyCell" office:value-type="string">
            <text:p text:style-name="TableText">sheet_out_local</text:p>
          </table:table-cell>
          <table:table-cell table:style-name="BodyCell" office:value-type="string">
            <text:p text:style-name="TableText">Semantic attention output only, local-channel version.</text:p>
          </table:table-cell>
          <table:table-cell table:style-name="BodyCell" office:value-type="string">
            <text:p text:style-name="TableText">new</text:p>
          </table:table-cell>
        </table:table-row>
        <table:table-row>
          <table:table-cell table:style-name="BodyCell" office:value-type="string">
            <text:p text:style-name="TableText">14</text:p>
          </table:table-cell>
          <table:table-cell table:style-name="BodyCell" office:value-type="string">
            <text:p text:style-name="TableText">sheet_attn_dmodel</text:p>
          </table:table-cell>
          <table:table-cell table:style-name="BodyCell" office:value-type="string">
            <text:p text:style-name="TableText">generic_sheet_col</text:p>
          </table:table-cell>
          <table:table-cell table:style-name="BodyCell" office:value-type="string">
            <text:p text:style-name="TableText">sheet_qkv</text:p>
          </table:table-cell>
          <table:table-cell table:style-name="BodyCell" office:value-type="string">
            <text:p text:style-name="TableText">sheet_out_dmodel</text:p>
          </table:table-cell>
          <table:table-cell table:style-name="BodyCell" office:value-type="string">
            <text:p text:style-name="TableText">Semantic attention, d_model-output version.</text:p>
          </table:table-cell>
          <table:table-cell table:style-name="BodyCell" office:value-type="string">
            <text:p text:style-name="TableText">new</text:p>
          </table:table-cell>
        </table:table-row>
        <table:table-row>
          <table:table-cell table:style-name="BodyCell" office:value-type="string">
            <text:p text:style-name="TableText">15</text:p>
          </table:table-cell>
          <table:table-cell table:style-name="BodyCell" office:value-type="string">
            <text:p text:style-name="TableText">sheet_attn_local</text:p>
          </table:table-cell>
          <table:table-cell table:style-name="BodyCell" office:value-type="string">
            <text:p text:style-name="TableText">generic_sheet_col</text:p>
          </table:table-cell>
          <table:table-cell table:style-name="BodyCell" office:value-type="string">
            <text:p text:style-name="TableText">sheet_qkv</text:p>
          </table:table-cell>
          <table:table-cell table:style-name="BodyCell" office:value-type="string">
            <text:p text:style-name="TableText">sheet_out_local</text:p>
          </table:table-cell>
          <table:table-cell table:style-name="BodyCell" office:value-type="string">
            <text:p text:style-name="TableText">Semantic attention, local-output version.</text:p>
          </table:table-cell>
          <table:table-cell table:style-name="BodyCell" office:value-type="string">
            <text:p text:style-name="TableText">new</text:p>
          </table:table-cell>
        </table:table-row>
        <table:table-row>
          <table:table-cell table:style-name="BodyCell" office:value-type="string">
            <text:p text:style-name="TableText">16</text:p>
          </table:table-cell>
          <table:table-cell table:style-name="BodyCell" office:value-type="string">
            <text:p text:style-name="TableText">sheet_mlp_qkv</text:p>
          </table:table-cell>
          <table:table-cell table:style-name="BodyCell" office:value-type="string">
            <text:p text:style-name="TableText">sheet_mlp</text:p>
          </table:table-cell>
          <table:table-cell table:style-name="BodyCell" office:value-type="string">
            <text:p text:style-name="TableText">sheet_qkv</text:p>
          </table:table-cell>
          <table:table-cell table:style-name="BodyCell" office:value-type="string">
            <text:p text:style-name="TableText">generic_sheet_col</text:p>
          </table:table-cell>
          <table:table-cell table:style-name="BodyCell" office:value-type="string">
            <text:p text:style-name="TableText">Semantic MLP plus QKV;<text:line-break/>generic attention output.</text:p>
          </table:table-cell>
          <table:table-cell table:style-name="BodyCell" office:value-type="string">
            <text:p text:style-name="TableText">new diagnostic</text:p>
          </table:table-cell>
        </table:table-row>
        <table:table-row>
          <table:table-cell table:style-name="BodyCell" office:value-type="string">
            <text:p text:style-name="TableText">17</text:p>
          </table:table-cell>
          <table:table-cell table:style-name="BodyCell" office:value-type="string">
            <text:p text:style-name="TableText">sheet_mlp_out_dmodel</text:p>
          </table:table-cell>
          <table:table-cell table:style-name="BodyCell" office:value-type="string">
            <text:p text:style-name="TableText">sheet_mlp</text:p>
          </table:table-cell>
          <table:table-cell table:style-name="BodyCell" office:value-type="string">
            <text:p text:style-name="TableText">generic_sheet_col</text:p>
          </table:table-cell>
          <table:table-cell table:style-name="BodyCell" office:value-type="string">
            <text:p text:style-name="TableText">sheet_out_dmodel</text:p>
          </table:table-cell>
          <table:table-cell table:style-name="BodyCell" office:value-type="string">
            <text:p text:style-name="TableText">Semantic MLP plus output-only d_model variant.</text:p>
          </table:table-cell>
          <table:table-cell table:style-name="BodyCell" office:value-type="string">
            <text:p text:style-name="TableText">new diagnostic</text:p>
          </table:table-cell>
        </table:table-row>
        <table:table-row>
          <table:table-cell table:style-name="BodyCell" office:value-type="string">
            <text:p text:style-name="TableText">18</text:p>
          </table:table-cell>
          <table:table-cell table:style-name="BodyCell" office:value-type="string">
            <text:p text:style-name="TableText">sheet_mlp_out_local</text:p>
          </table:table-cell>
          <table:table-cell table:style-name="BodyCell" office:value-type="string">
            <text:p text:style-name="TableText">sheet_mlp</text:p>
          </table:table-cell>
          <table:table-cell table:style-name="BodyCell" office:value-type="string">
            <text:p text:style-name="TableText">generic_sheet_col</text:p>
          </table:table-cell>
          <table:table-cell table:style-name="BodyCell" office:value-type="string">
            <text:p text:style-name="TableText">sheet_out_local</text:p>
          </table:table-cell>
          <table:table-cell table:style-name="BodyCell" office:value-type="string">
            <text:p text:style-name="TableText">Semantic MLP plus output-only local variant.</text:p>
          </table:table-cell>
          <table:table-cell table:style-name="BodyCell" office:value-type="string">
            <text:p text:style-name="TableText">new diagnostic</text:p>
          </table:table-cell>
        </table:table-row>
        <table:table-row>
          <table:table-cell table:style-name="BodyCell" office:value-type="string">
            <text:p text:style-name="TableText">19</text:p>
          </table:table-cell>
          <table:table-cell table:style-name="BodyCell" office:value-type="string">
            <text:p text:style-name="TableText">sheet_full_dmodel</text:p>
          </table:table-cell>
          <table:table-cell table:style-name="BodyCell" office:value-type="string">
            <text:p text:style-name="TableText">sheet_mlp</text:p>
          </table:table-cell>
          <table:table-cell table:style-name="BodyCell" office:value-type="string">
            <text:p text:style-name="TableText">sheet_qkv</text:p>
          </table:table-cell>
          <table:table-cell table:style-name="BodyCell" office:value-type="string">
            <text:p text:style-name="TableText">sheet_out_dmodel</text:p>
          </table:table-cell>
          <table:table-cell table:style-name="BodyCell" office:value-type="string">
            <text:p text:style-name="TableText">Full semantic sheet, d_model-output version.</text:p>
          </table:table-cell>
          <table:table-cell table:style-name="BodyCell" office:value-type="string">
            <text:p text:style-name="TableText">new</text:p>
          </table:table-cell>
        </table:table-row>
        <table:table-row>
          <table:table-cell table:style-name="BodyCell" office:value-type="string">
            <text:p text:style-name="TableText">20</text:p>
          </table:table-cell>
          <table:table-cell table:style-name="BodyCell" office:value-type="string">
            <text:p text:style-name="TableText">sheet_full_local</text:p>
          </table:table-cell>
          <table:table-cell table:style-name="BodyCell" office:value-type="string">
            <text:p text:style-name="TableText">sheet_mlp</text:p>
          </table:table-cell>
          <table:table-cell table:style-name="BodyCell" office:value-type="string">
            <text:p text:style-name="TableText">sheet_qkv</text:p>
          </table:table-cell>
          <table:table-cell table:style-name="BodyCell" office:value-type="string">
            <text:p text:style-name="TableText">sheet_out_local</text:p>
          </table:table-cell>
          <table:table-cell table:style-name="BodyCell" office:value-type="string">
            <text:p text:style-name="TableText">Full semantic sheet, local-output version.</text:p>
          </table:table-cell>
          <table:table-cell table:style-name="BodyCell" office:value-type="string">
            <text:p text:style-name="TableText">new</text:p>
          </table:table-cell>
        </table:table-row>
      </table:table>
      <text:p text:style-name="Body"/>
      <text:h text:style-name="Heading_20_2" text:outline-level="2">5.2 Preset naming policy</text:h>
      <text:p text:style-name="Req"><text:span text:style-name="Bold">5.2.1</text:span>  A preset name shall describe the component combination without requiring chronological context.</text:p>
      <text:p text:style-name="Req"><text:span text:style-name="Bold">5.2.2</text:span>  A full semantic sheet preset shall activate sheet_mlp, sheet_qkv, and exactly one attention-output sheet option.</text:p>
      <text:p text:style-name="Req"><text:span text:style-name="Bold">5.2.3</text:span>  The suffix dmodel shall identify the attention-output option that compresses d_model_output and leaves head plus local_head_channel whole.</text:p>
      <text:p text:style-name="Req"><text:span text:style-name="Bold">5.2.4</text:span>  The suffix local shall identify the attention-output option that compresses local_head_channel and leaves d_model_output plus head whole.</text:p>
      <text:h text:style-name="Heading_20_1" text:outline-level="1">6 Detailed Geometry Requirements</text:h>
      <text:h text:style-name="Heading_20_2" text:outline-level="2">6.1 Dense baseline</text:h>
      <text:p text:style-name="Req"><text:span text:style-name="Bold">6.1.1</text:span>  dense shall use conventional layer-specific transformer weights.</text:p>
      <text:p text:style-name="Req"><text:span text:style-name="Bold">6.1.2</text:span>  dense shall not consume compact basis orders.</text:p>
      <text:p text:style-name="Req"><text:span text:style-name="Bold">6.1.3</text:span>  dense shall remain available as the architectural control.</text:p>
      <text:h text:style-name="Heading_20_2" text:outline-level="2">6.2 Depth geometry</text:h>
      <text:p text:style-name="Req"><text:span text:style-name="Bold">6.2.1</text:span>  depth shall compress transformer depth only.</text:p>
      <text:p text:style-name="Req"><text:span text:style-name="Bold">6.2.2</text:span>  depth shall leave output_rows and input_cols whole.</text:p>
      <text:p text:style-name="Req"><text:span text:style-name="Bold">6.2.3</text:span>  depth shall apply to repeated attention and MLP matrix families.</text:p>
      <text:p text:style-name="Code">W_l[o,i] = sum_p C[o,i,p] * B_depth[l,p]</text:p>
      <text:h text:style-name="Heading_20_2" text:outline-level="2">6.3 Generic sheet geometries</text:h>
      <text:p text:style-name="Req"><text:span text:style-name="Bold">6.3.1</text:span>  generic_sheet_col shall compress depth and input_cols while leaving output_rows whole.</text:p>
      <text:p text:style-name="Req"><text:span text:style-name="Bold">6.3.2</text:span>  legacy_sheet_col shall resolve identically to generic_sheet_col.</text:p>
      <text:p text:style-name="Req"><text:span text:style-name="Bold">6.3.3</text:span>  generic_sheet_row shall compress depth and output_rows while leaving input_cols whole.</text:p>
      <text:p text:style-name="Req"><text:span text:style-name="Bold">6.3.4</text:span>  generic_sheet_row shall be treated as a completeness ablation, not as the primary semantic hypothesis.</text:p>
      <text:p text:style-name="Code">generic_sheet_col: W_l[o,i] = sum_pq C[o,p,q] * B_depth[l,p] * B_in[i,q]</text:p>
      <text:p text:style-name="Code">generic_sheet_row: W_l[o,i] = sum_pq C[i,p,q] * B_depth[l,p] * B_out[o,q]</text:p>
      <text:h text:style-name="Heading_20_2" text:outline-level="2">6.4 Block geometries</text:h>
      <text:p text:style-name="Req"><text:span text:style-name="Bold">6.4.1</text:span>  mlp_block shall apply only to MLP expansion and MLP contraction matrix families.</text:p>
      <text:p text:style-name="Req"><text:span text:style-name="Bold">6.4.2</text:span>  mlp_block shall compress depth, the MLP output axis, and the MLP input axis.</text:p>
      <text:p text:style-name="Req"><text:span text:style-name="Bold">6.4.3</text:span>  head_aware_block shall apply only to attention QKV and attention output matrix families.</text:p>
      <text:p text:style-name="Req"><text:span text:style-name="Bold">6.4.4</text:span>  head_aware_block shall keep QKV role and attention head index whole.</text:p>
      <text:p text:style-name="Req"><text:span text:style-name="Bold">6.4.5</text:span>  full_block shall resolve to mlp_block for MLP and head_aware_block for attention.</text:p>
      <text:p text:style-name="Code">block form: W_l[o,i] = sum_pqr C[p,q,r] * B_depth[l,p] * B_out[o,q] * B_in[i,r]</text:p>
      <text:h text:style-name="Heading_20_2" text:outline-level="2">6.5 Semantic MLP sheet</text:h>
      <text:p text:style-name="Req"><text:span text:style-name="Bold">6.5.1</text:span>  sheet_mlp shall apply to MLP expansion and MLP contraction.</text:p>
      <text:p text:style-name="Req"><text:span text:style-name="Bold">6.5.2</text:span>  For MLP expansion, sheet_mlp shall leave hidden_channel whole and compress depth plus d_model_input.</text:p>
      <text:p text:style-name="Req"><text:span text:style-name="Bold">6.5.3</text:span>  For MLP contraction, sheet_mlp shall leave hidden_channel whole and compress depth plus d_model_output.</text:p>
      <text:p text:style-name="Req"><text:span text:style-name="Bold">6.5.4</text:span>  sheet_mlp shall preserve hidden-channel identity across both sides of the MLP.</text:p>
      <text:p text:style-name="Code">MLP up:   compressed = depth, d_model_input;  whole = hidden_channel</text:p>
      <text:p text:style-name="Code">MLP down: compressed = depth, d_model_output; whole = hidden_channel</text:p>
      <text:h text:style-name="Heading_20_2" text:outline-level="2">6.6 Semantic attention sheets</text:h>
      <text:p text:style-name="Req"><text:span text:style-name="Bold">6.6.1</text:span>  sheet_qkv shall apply to the QKV input projection.</text:p>
      <text:p text:style-name="Req"><text:span text:style-name="Bold">6.6.2</text:span>  sheet_qkv shall leave qkv_role, head, and local_head_channel whole.</text:p>
      <text:p text:style-name="Req"><text:span text:style-name="Bold">6.6.3</text:span>  sheet_qkv shall compress depth and d_model_input.</text:p>
      <text:p text:style-name="Req"><text:span text:style-name="Bold">6.6.4</text:span>  sheet_out_dmodel shall apply to attention output, compress depth and d_model_output, and leave head plus local_head_channel whole.</text:p>
      <text:p text:style-name="Req"><text:span text:style-name="Bold">6.6.5</text:span>  sheet_out_local shall apply to attention output, compress depth and local_head_channel, and leave d_model_output plus head whole.</text:p>
      <text:p text:style-name="Req"><text:span text:style-name="Bold">6.6.6</text:span>  Semantic attention presets shall include sheet_qkv plus exactly one of sheet_out_dmodel or sheet_out_local.</text:p>
      <text:p text:style-name="Code">QKV:              compressed = depth, d_model_input;  whole = qkv_role, head, local_head_channel</text:p>
      <text:p text:style-name="Code">attn_out_dmodel:  compressed = depth, d_model_output; whole = head, local_head_channel</text:p>
      <text:p text:style-name="Code">attn_out_local:   compressed = depth, local_head_channel; whole = d_model_output, head</text:p>
      <text:h text:style-name="Heading_20_1" text:outline-level="1">7 Configuration and Model Identity</text:h>
      <text:h text:style-name="Heading_20_2" text:outline-level="2">7.1 Required identity fields</text:h>
      <text:p text:style-name="Req"><text:span text:style-name="Bold">7.1.1</text:span>  Model identity shall record model_family, geometry_preset, resolved MLP component, resolved QKV component, and resolved attention-output component.</text:p>
      <text:p text:style-name="Req"><text:span text:style-name="Bold">7.1.2</text:span>  Model identity shall record basis_family, basis_version, model dimensions, head count, head dimension, and all compact orders consumed by the selected geometry.</text:p>
      <text:p text:style-name="Req"><text:span text:style-name="Bold">7.1.3</text:span>  Model identity shall record semantic family names and coefficient shapes for compact matrix families.</text:p>
      <text:p text:style-name="Req"><text:span text:style-name="Bold">7.1.4</text:span>  Compatibility aliases shall be recorded in a way that preserves both the requested name and the resolved canonical name where practical.</text:p>
      <text:h text:style-name="Heading_20_2" text:outline-level="2">7.2 Preset resolution requirements</text:h>
      <text:p text:style-name="Req"><text:span text:style-name="Bold">7.2.1</text:span>  Preset resolution shall be deterministic.</text:p>
      <text:p text:style-name="Req"><text:span text:style-name="Bold">7.2.2</text:span>  Invalid component combinations shall fail early rather than silently falling back to another geometry.</text:p>
      <text:p text:style-name="Req"><text:span text:style-name="Bold">7.2.3</text:span>  The resolver shall be able to map existing names depth, curve, legacy_sheet_col, mlp_block, head_aware_block, and full_block.</text:p>
      <text:p text:style-name="Req"><text:span text:style-name="Bold">7.2.4</text:span>  The resolver shall be able to map the new semantic sheet names listed in Section 5.1.</text:p>
      <text:h text:style-name="Heading_20_1" text:outline-level="1">8 Out of Scope</text:h>
      <text:p text:style-name="Req"><text:span text:style-name="Bold">8.1.1</text:span>  Token embedding compaction is out of scope for this version.</text:p>
      <text:p text:style-name="Req"><text:span text:style-name="Bold">8.1.2</text:span>  Positional embedding compaction is out of scope for this version.</text:p>
      <text:p text:style-name="Req"><text:span text:style-name="Bold">8.1.3</text:span>  LayerNorm compaction is out of scope for this version.</text:p>
      <text:p text:style-name="Req"><text:span text:style-name="Bold">8.1.4</text:span>  Attention and MLP bias compaction are out of scope for this version.</text:p>
      <text:p text:style-name="Req"><text:span text:style-name="Bold">8.1.5</text:span>  Runtime optimisation, testing strategy, implementation staging, and empirical performance interpretation are out of scope for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xmlns:svg="urn:oasis:names:tc:opendocument:xmlns:svg-compatible:1.0" office:version="1.2">
  <office:font-face-decls>
    <style:font-face style:name="Liberation Serif" svg:font-family="Liberation Serif"/>
    <style:font-face style:name="Liberation Sans" svg:font-family="Liberation Sans"/>
    <style:font-face style:name="Liberation Mono" svg:font-family="Liberation Mono"/>
  </office:font-face-decls>
  <office:styles>
    <style:default-style style:family="paragraph">
      <style:text-properties style:font-name="Liberation Serif" fo:font-size="11pt"/>
    </style:default-style>
  </office:styles>
  <office:automatic-styles>
    <style:page-layout style:name="pm1">
      <style:page-layout-properties fo:page-width="29.7cm" fo:page-height="42cm" style:print-orientation="portrait" fo:margin-left="1.8cm" fo:margin-right="1.8cm" fo:margin-top="1.8cm" fo:margin-bottom="1.8cm"/>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office:version="1.2">
  <office:meta>
    <meta:creation-date>2026-07-18T00:56:20.095583Z</meta:creation-date>
    <meta:generator>OpenAI generated ODT</meta:generator>
  </office:meta>
</office:document-meta>
</file>