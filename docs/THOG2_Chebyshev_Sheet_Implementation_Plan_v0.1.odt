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8547*"/>
    </style:style>
    <style:style style:name="Table1.B" style:family="table-column">
      <style:table-column-properties style:rel-column-width="46987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0922*"/>
    </style:style>
    <style:style style:name="Table2.B" style:family="table-column">
      <style:table-column-properties style:rel-column-width="21845*"/>
    </style:style>
    <style:style style:name="Table2.C" style:family="table-column">
      <style:table-column-properties style:rel-column-width="32767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968*"/>
    </style:style>
    <style:style style:name="Table3.B" style:family="table-column">
      <style:table-column-properties style:rel-column-width="5851*"/>
    </style:style>
    <style:style style:name="Table3.C" style:family="table-column">
      <style:table-column-properties style:rel-column-width="8777*"/>
    </style:style>
    <style:style style:name="Table3.D" style:family="table-column">
      <style:table-column-properties style:rel-column-width="20479*"/>
    </style:style>
    <style:style style:name="Table3.E" style:family="table-column">
      <style:table-column-properties style:rel-column-width="13458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2340*"/>
    </style:style>
    <style:style style:name="Table4.B" style:family="table-column">
      <style:table-column-properties style:rel-column-width="8777*"/>
    </style:style>
    <style:style style:name="Table4.C" style:family="table-column">
      <style:table-column-properties style:rel-column-width="30719*"/>
    </style:style>
    <style:style style:name="Table4.D" style:family="table-column">
      <style:table-column-properties style:rel-column-width="23697*"/>
    </style:style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2372*"/>
    </style:style>
    <style:style style:name="Table5.B" style:family="table-column">
      <style:table-column-properties style:rel-column-width="10082*"/>
    </style:style>
    <style:style style:name="Table5.C" style:family="table-column">
      <style:table-column-properties style:rel-column-width="29060*"/>
    </style:style>
    <style:style style:name="Table5.D" style:family="table-column">
      <style:table-column-properties style:rel-column-width="24019*"/>
    </style:style>
  </office:automatic-styles>
  <office:body>
    <office:text>
      <text:p text:style-name="Text_20_body">THOG2</text:p>
      <text:p text:style-name="Text_20_body">Chebyshev Sheet Implementation Plan</text:p>
      <text:p text:style-name="Text_20_body">Version 0.1</text:p>
      <table:table table:name="Table1" table:style-name="Table1">
        <table:table-column table:style-name="Table1.A"/>
        <table:table-column table:style-name="Table1.B"/>
        <table:table-row>
          <table:table-cell table:style-name="TableRowCell" office:value-type="string">
            <text:p text:style-name="Table_20_Contents"><text:span text:style-name="T1">System</text:span></text:p>
          </table:table-cell>
          <table:table-cell table:style-name="TableRowCell" office:value-type="string">
            <text:p text:style-name="Table_20_Contents">thog2 enhancement of nanoGPT</text:p>
          </table:table-cell>
        </table:table-row>
        <table:table-row>
          <table:table-cell table:style-name="TableRowCell" office:value-type="string">
            <text:p text:style-name="Table_20_Contents"><text:span text:style-name="T1">Architecture designation</text:span></text:p>
          </table:table-cell>
          <table:table-cell table:style-name="TableRowCell" office:value-type="string">
            <text:p text:style-name="Table_20_Contents">Chebyshev Sheet</text:p>
          </table:table-cell>
        </table:table-row>
        <table:table-row>
          <table:table-cell table:style-name="TableRowCell" office:value-type="string">
            <text:p text:style-name="Table_20_Contents"><text:span text:style-name="T1">Governing specification</text:span></text:p>
          </table:table-cell>
          <table:table-cell table:style-name="TableRowCell" office:value-type="string">
            <text:p text:style-name="Table_20_Contents">THOG2 Chebyshev Sheet Requirements Specification v0.1</text:p>
          </table:table-cell>
        </table:table-row>
        <table:table-row>
          <table:table-cell table:style-name="TableRowCell" office:value-type="string">
            <text:p text:style-name="Table_20_Contents"><text:span text:style-name="T1">Status</text:span></text:p>
          </table:table-cell>
          <table:table-cell table:style-name="TableRowCell" office:value-type="string">
            <text:p text:style-name="Table_20_Contents">Draft implementation plan; repository implementation not commenced</text:p>
          </table:table-cell>
        </table:table-row>
        <table:table-row>
          <table:table-cell table:style-name="TableRowCell" office:value-type="string">
            <text:p text:style-name="Table_20_Contents"><text:span text:style-name="T1">Date</text:span></text:p>
          </table:table-cell>
          <table:table-cell table:style-name="TableRowCell" office:value-type="string">
            <text:p text:style-name="Table_20_Contents">2 July 2026</text:p>
          </table:table-cell>
        </table:table-row>
        <table:table-row>
          <table:table-cell table:style-name="TableRowCell" office:value-type="string">
            <text:p text:style-name="Table_20_Contents"><text:span text:style-name="T1">Planned repository</text:span></text:p>
          </table:table-cell>
          <table:table-cell table:style-name="TableRowCell" office:value-type="string">
            <text:p text:style-name="Table_20_Contents">thog2</text:p>
          </table:table-cell>
        </table:table-row>
        <table:table-row>
          <table:table-cell table:style-name="TableRowCell" office:value-type="string">
            <text:p text:style-name="Table_20_Contents"><text:span text:style-name="T1">Repository baseline</text:span></text:p>
          </table:table-cell>
          <table:table-cell table:style-name="TableRowCell" office:value-type="string">
            <text:p text:style-name="Table_20_Contents">Fresh clone of nanoGPT</text:p>
          </table:table-cell>
        </table:table-row>
        <table:table-row>
          <table:table-cell table:style-name="TableRowCell" office:value-type="string">
            <text:p text:style-name="Table_20_Contents"><text:span text:style-name="T1">Repository interaction</text:span></text:p>
          </table:table-cell>
          <table:table-cell table:style-name="TableRowCell" office:value-type="string">
            <text:p text:style-name="Table_20_Contents">None; this document is authored outside GitHub pending repository creation</text:p>
          </table:table-cell>
        </table:table-row>
      </table:table>
      <text:p text:style-name="First_20_paragraph">Non-normative note: This plan deliberately does not modify the existing thog repository or the future thog2 repository. It is intended to be version-controlled in thog2 after the repository is created and access is provided.</text:p>
      <text:h text:style-name="Heading_20_1" text:outline-level="1"><text:bookmark-start text:name="purpose-and-authority"/>1. Purpose and authority<text:bookmark-end text:name="purpose-and-authority"/></text:h>
      <text:p text:style-name="First_20_paragraph"><text:span text:style-name="T1">1.1 </text:span>This document defines the planned implementation of the Chebyshev Sheet architecture in the future thog2 repository.</text:p>
      <text:p text:style-name="Text_20_body"><text:span text:style-name="T1">1.2 </text:span>The governing functional requirements are contained in THOG2 Chebyshev Sheet Requirements Specification v0.1.</text:p>
      <text:p text:style-name="Text_20_body"><text:span text:style-name="T1">1.3 </text:span>Where this plan conflicts with the governing requirements specification, the requirements specification shall prevail until a versioned amendment resolves the conflict.</text:p>
      <text:p text:style-name="Text_20_body"><text:span text:style-name="T1">1.4 </text:span>This plan specifies implementation structure, sequencing, design decisions, validation gates, and expected artifacts.</text:p>
      <text:p text:style-name="Text_20_body"><text:span text:style-name="T1">1.5 </text:span>This plan does not itself authorise changes to the existing thog repository.</text:p>
      <text:p text:style-name="Text_20_body"><text:span text:style-name="T1">1.6 </text:span>The implementation shall begin only after the thog2 repository exists and its baseline state has been captured.</text:p>
      <text:p text:style-name="Text_20_body"><text:span text:style-name="T1">1.7 </text:span>The implementation shall preserve a working dense nanoGPT path throughout development.</text:p>
      <text:p text:style-name="Text_20_body"><text:span text:style-name="T1">1.8 </text:span>Scientific superiority shall not be treated as an implementation acceptance criterion.</text:p>
      <text:h text:style-name="Heading_20_1" text:outline-level="1"><text:bookmark-start text:name="implementation-principles"/>2. Implementation principles<text:bookmark-end text:name="implementation-principles"/></text:h>
      <text:p text:style-name="First_20_paragraph"><text:span text:style-name="T1">2.1 </text:span>Correctness shall precede optimization.</text:p>
      <text:p text:style-name="Text_20_body"><text:span text:style-name="T1">2.2 </text:span>The first complete path shall use ordinary PyTorch tensor operations and autograd without custom CUDA kernels.</text:p>
      <text:p text:style-name="Text_20_body"><text:span text:style-name="T1">2.3 </text:span>The implementation shall generate one logical layer at a time and shall not persist the complete sampled logical block stack.</text:p>
      <text:p text:style-name="Text_20_body"><text:span text:style-name="T1">2.4 </text:span>Every generated matrix family shall use one universal bivariate Chebyshev software abstraction parameterised by shape and initialization policy.</text:p>
      <text:p text:style-name="Text_20_body"><text:span text:style-name="T1">2.5 </text:span>Matrix output rows shall remain distinct sheets; output-row and within-row coordinates shall not be flattened together.</text:p>
      <text:p text:style-name="Text_20_body"><text:span text:style-name="T1">2.6 </text:span>The horizontal coordinate shall initially be the fixed left-to-right within-row index normalized to the closed interval from -1 to 1.</text:p>
      <text:p text:style-name="Text_20_body"><text:span text:style-name="T1">2.7 </text:span>The implementation shall use next-token cross-entropy only and shall not add auxiliary losses.</text:p>
      <text:p text:style-name="Text_20_body"><text:span text:style-name="T1">2.8 </text:span>The dense and sheet models should share the same training loop so that controlled comparisons are not confounded by duplicated trainer behavior.</text:p>
      <text:p text:style-name="Text_20_body"><text:span text:style-name="T1">2.9 </text:span>The dense model implementation itself shall remain structurally independent of sheet parameters.</text:p>
      <text:p text:style-name="Text_20_body"><text:span text:style-name="T1">2.10 </text:span>All changes to original nanoGPT source shall follow the project source-preservation and THOG-marker conventions.</text:p>
      <text:p text:style-name="Text_20_body"><text:span text:style-name="T1">2.11 </text:span>No existing nanoGPT source line shall be deleted when it is superseded; the original line shall remain commented where required by the project convention.</text:p>
      <text:h text:style-name="Heading_20_1" text:outline-level="1"><text:bookmark-start text:name="repository-and-branch-strategy"/>3. Repository and branch strategy<text:bookmark-end text:name="repository-and-branch-strategy"/></text:h>
      <text:p text:style-name="First_20_paragraph"><text:span text:style-name="T1">3.1 </text:span>The initial thog2 repository shall be a clean clone of the selected nanoGPT baseline commit.</text:p>
      <text:p text:style-name="Text_20_body"><text:span text:style-name="T1">3.2 </text:span>The baseline commit SHA, upstream URL, Python environment, PyTorch version, CUDA version, GPU model, and a dense smoke result shall be recorded before architecture work begins.</text:p>
      <text:p text:style-name="Text_20_body"><text:span text:style-name="T1">3.3 </text:span>The default branch shall remain a reviewable baseline until the implementation branch is created.</text:p>
      <text:p text:style-name="Text_20_body"><text:span text:style-name="T1">3.4 </text:span>Implementation shall occur on a dedicated feature branch whose final name shall be selected after repository inspection.</text:p>
      <text:p text:style-name="Text_20_body"><text:span text:style-name="T1">3.5 </text:span>A separate staging plan shall define exact commit and pull-request boundaries.</text:p>
      <text:p text:style-name="Text_20_body"><text:span text:style-name="T1">3.6 </text:span>Each implementation work package shall leave the branch executable and testable.</text:p>
      <text:p text:style-name="Text_20_body"><text:span text:style-name="T1">3.7 </text:span>Generated datasets, checkpoints, logs, and run artifacts shall not be committed unless explicitly selected as small test fixtures.</text:p>
      <text:p text:style-name="Text_20_body"><text:span text:style-name="T1">3.8 </text:span>Documentation created before repository availability shall be added in a documentation-only commit before or alongside the first implementation work package.</text:p>
      <text:h text:style-name="Heading_20_1" text:outline-level="1"><text:bookmark-start text:name="planned-source-structure"/>4. Planned source structure<text:bookmark-end text:name="planned-source-structure"/></text:h>
      <text:p text:style-name="First_20_paragraph"><text:span text:style-name="T1">4.1 </text:span>Final paths shall be confirmed against the actual nanoGPT clone before the first code change.</text:p>
      <text:p text:style-name="Text_20_body"><text:span text:style-name="T1">4.2 </text:span>The preferred source layout is shown below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RowCell" office:value-type="string">
            <text:p text:style-name="Table_20_Contents"><text:span text:style-name="T1">Path</text:span></text:p>
          </table:table-cell>
          <table:table-cell table:style-name="TableRowCell" office:value-type="string">
            <text:p text:style-name="Table_20_Contents"><text:span text:style-name="T1">Purpose</text:span></text:p>
          </table:table-cell>
          <table:table-cell table:style-name="TableRowCell" office:value-type="string">
            <text:p text:style-name="Table_20_Contents"><text:span text:style-name="T1">Implementation note</text:span></text:p>
          </table:table-cell>
        </table:table-row>
        <table:table-row>
          <table:table-cell table:style-name="TableRowCell" office:value-type="string">
            <text:p text:style-name="Table_20_Contents">model.py</text:p>
          </table:table-cell>
          <table:table-cell table:style-name="TableRowCell" office:value-type="string">
            <text:p text:style-name="Table_20_Contents">Retained dense nanoGPT model</text:p>
          </table:table-cell>
          <table:table-cell table:style-name="TableRowCell" office:value-type="string">
            <text:p text:style-name="Table_20_Contents">Modify only where a shared factory or configuration hook is necessary.</text:p>
          </table:table-cell>
        </table:table-row>
        <table:table-row>
          <table:table-cell table:style-name="TableRowCell" office:value-type="string">
            <text:p text:style-name="Table_20_Contents">train.py</text:p>
          </table:table-cell>
          <table:table-cell table:style-name="TableRowCell" office:value-type="string">
            <text:p text:style-name="Table_20_Contents">Shared dense and sheet training loop</text:p>
          </table:table-cell>
          <table:table-cell table:style-name="TableRowCell" office:value-type="string">
            <text:p text:style-name="Table_20_Contents">Add architecture selection while preserving dense behavior.</text:p>
          </table:table-cell>
        </table:table-row>
        <table:table-row>
          <table:table-cell table:style-name="TableRowCell" office:value-type="string">
            <text:p text:style-name="Table_20_Contents">sample.py</text:p>
          </table:table-cell>
          <table:table-cell table:style-name="TableRowCell" office:value-type="string">
            <text:p text:style-name="Table_20_Contents">Checkpoint-driven inference</text:p>
          </table:table-cell>
          <table:table-cell table:style-name="TableRowCell" office:value-type="string">
            <text:p text:style-name="Table_20_Contents">Instantiate dense or sheet model from checkpoint metadata.</text:p>
          </table:table-cell>
        </table:table-row>
        <table:table-row>
          <table:table-cell table:style-name="TableRowCell" office:value-type="string">
            <text:p text:style-name="Table_20_Contents">sheet/__init__.py</text:p>
          </table:table-cell>
          <table:table-cell table:style-name="TableRowCell" office:value-type="string">
            <text:p text:style-name="Table_20_Contents">Sheet package boundary</text:p>
          </table:table-cell>
          <table:table-cell table:style-name="TableRowCell" office:value-type="string">
            <text:p text:style-name="Table_20_Contents">No runtime dependency on the existing thog repository.</text:p>
          </table:table-cell>
        </table:table-row>
        <table:table-row>
          <table:table-cell table:style-name="TableRowCell" office:value-type="string">
            <text:p text:style-name="Table_20_Contents">sheet/basis.py</text:p>
          </table:table-cell>
          <table:table-cell table:style-name="TableRowCell" office:value-type="string">
            <text:p text:style-name="Table_20_Contents">Coordinate and basis construction</text:p>
          </table:table-cell>
          <table:table-cell table:style-name="TableRowCell" office:value-type="string">
            <text:p text:style-name="Table_20_Contents">Chebyshev recurrence, QR orthogonalisation, rank and condition checks.</text:p>
          </table:table-cell>
        </table:table-row>
        <table:table-row>
          <table:table-cell table:style-name="TableRowCell" office:value-type="string">
            <text:p text:style-name="Table_20_Contents">sheet/geometry.py</text:p>
          </table:table-cell>
          <table:table-cell table:style-name="TableRowCell" office:value-type="string">
            <text:p text:style-name="Table_20_Contents">Family shapes and Q scaling</text:p>
          </table:table-cell>
          <table:table-cell table:style-name="TableRowCell" office:value-type="string">
            <text:p text:style-name="Table_20_Contents">Single source of truth for R_f, C_f, and derived Q_f.</text:p>
          </table:table-cell>
        </table:table-row>
        <table:table-row>
          <table:table-cell table:style-name="TableRowCell" office:value-type="string">
            <text:p text:style-name="Table_20_Contents">sheet/trajectory.py</text:p>
          </table:table-cell>
          <table:table-cell table:style-name="TableRowCell" office:value-type="string">
            <text:p text:style-name="Table_20_Contents">Compact coefficient state and materialisation</text:p>
          </table:table-cell>
          <table:table-cell table:style-name="TableRowCell" office:value-type="string">
            <text:p text:style-name="Table_20_Contents">One depth basis, shared row-basis cache, family-specific coefficients.</text:p>
          </table:table-cell>
        </table:table-row>
        <table:table-row>
          <table:table-cell table:style-name="TableRowCell" office:value-type="string">
            <text:p text:style-name="Table_20_Contents">sheet/model.py</text:p>
          </table:table-cell>
          <table:table-cell table:style-name="TableRowCell" office:value-type="string">
            <text:p text:style-name="Table_20_Contents">Sheet GPT and functional block execution</text:p>
          </table:table-cell>
          <table:table-cell table:style-name="TableRowCell" office:value-type="string">
            <text:p text:style-name="Table_20_Contents">Uses generated weights with functional PyTorch operations.</text:p>
          </table:table-cell>
        </table:table-row>
        <table:table-row>
          <table:table-cell table:style-name="TableRowCell" office:value-type="string">
            <text:p text:style-name="Table_20_Contents">sheet/checkpointing.py</text:p>
          </table:table-cell>
          <table:table-cell table:style-name="TableRowCell" office:value-type="string">
            <text:p text:style-name="Table_20_Contents">Segmented indexed execution</text:p>
          </table:table-cell>
          <table:table-cell table:style-name="TableRowCell" office:value-type="string">
            <text:p text:style-name="Table_20_Contents">Non-reentrant activation checkpointing and RNG preservation.</text:p>
          </table:table-cell>
        </table:table-row>
        <table:table-row>
          <table:table-cell table:style-name="TableRowCell" office:value-type="string">
            <text:p text:style-name="Table_20_Contents">sheet/metrics.py</text:p>
          </table:table-cell>
          <table:table-cell table:style-name="TableRowCell" office:value-type="string">
            <text:p text:style-name="Table_20_Contents">Detached diagnostics and parameter accounting</text:p>
          </table:table-cell>
          <table:table-cell table:style-name="TableRowCell" office:value-type="string">
            <text:p text:style-name="Table_20_Contents">No influence on gradients.</text:p>
          </table:table-cell>
        </table:table-row>
        <table:table-row>
          <table:table-cell table:style-name="TableRowCell" office:value-type="string">
            <text:p text:style-name="Table_20_Contents">sheet/run_naming.py</text:p>
          </table:table-cell>
          <table:table-cell table:style-name="TableRowCell" office:value-type="string">
            <text:p text:style-name="Table_20_Contents">Stable architecture-first names</text:p>
          </table:table-cell>
          <table:table-cell table:style-name="TableRowCell" office:value-type="string">
            <text:p text:style-name="Table_20_Contents">Include L, d, P, and Q_d.</text:p>
          </table:table-cell>
        </table:table-row>
        <table:table-row>
          <table:table-cell table:style-name="TableRowCell" office:value-type="string">
            <text:p text:style-name="Table_20_Contents">tests/</text:p>
          </table:table-cell>
          <table:table-cell table:style-name="TableRowCell" office:value-type="string">
            <text:p text:style-name="Table_20_Contents">Unit, integration, GPU, DDP, and source guards</text:p>
          </table:table-cell>
          <table:table-cell table:style-name="TableRowCell" office:value-type="string">
            <text:p text:style-name="Table_20_Contents">Detailed coverage shall be governed by the later test plan.</text:p>
          </table:table-cell>
        </table:table-row>
      </table:table>
      <text:p text:style-name="First_20_paragraph"><text:span text:style-name="T1">4.3 </text:span>If repository inspection shows that a smaller or clearer layout is preferable, the implementation may consolidate modules provided responsibilities and tests remain separable.</text:p>
      <text:p text:style-name="Text_20_body"><text:span text:style-name="T1">4.4 </text:span>The implementation shall not copy the existing thog package wholesale.</text:p>
      <text:p text:style-name="Text_20_body"><text:span text:style-name="T1">4.5 </text:span>Reusable infrastructure from thog may be ported selectively only after its behavior and dependencies are reviewed.</text:p>
      <text:h text:style-name="Heading_20_1" text:outline-level="1"><text:bookmark-start text:name="configuration-and-model-selection"/>5. Configuration and model selection<text:bookmark-end text:name="configuration-and-model-selection"/></text:h>
      <text:p text:style-name="First_20_paragraph"><text:span text:style-name="T1">5.1 </text:span>The shared training configuration shall include a model_type value supporting at least dense and thog2_sheet.</text:p>
      <text:p text:style-name="Text_20_body"><text:span text:style-name="T1">5.2 </text:span>The sheet model configuration shall include L, d, attention-head count, context length, bias, dropout, P, and Q_d.</text:p>
      <text:p text:style-name="Text_20_body"><text:span text:style-name="T1">5.3 </text:span>The principal initial geometry shall use L equal to 144, d equal to 768, P equal to 16, and Q_d equal to 128.</text:p>
      <text:p text:style-name="Text_20_body"><text:span text:style-name="T1">5.4 </text:span>For a row width C_f, the default row basis count shall be derived as follows.</text:p>
      <text:p text:style-name="P1">Q_f = min(C_f, ceil(C_f * Q_d / d))</text:p>
      <text:p text:style-name="First_20_paragraph"><text:span text:style-name="T1">5.5 </text:span>For d equal to 768 and Q_d equal to 128, rows of width 3072 shall therefore use Q_f equal to 512.</text:p>
      <text:p text:style-name="Text_20_body"><text:span text:style-name="T1">5.6 </text:span>Configuration validation shall reject non-positive dimensions, P greater than L, Q_d greater than d, incompatible head geometry, and any derived Q_f outside the valid range.</text:p>
      <text:p text:style-name="Text_20_body"><text:span text:style-name="T1">5.7 </text:span>Checkpoint model arguments shall record the basis-construction version and row-order scaling rule so that future changes cannot silently reinterpret old state.</text:p>
      <text:p text:style-name="Text_20_body"><text:span text:style-name="T1">5.8 </text:span>Activation-checkpoint settings shall be treated as execution controls rather than mathematical model state where compatibility permits.</text:p>
      <text:p text:style-name="Text_20_body"><text:span text:style-name="T1">5.9 </text:span>The first implementation shall not expose learned row coordinates, row permutations, coordinate warping, Vermeer, or auxiliary losses.</text:p>
      <text:h text:style-name="Heading_20_1" text:outline-level="1"><text:bookmark-start text:name="basis-construction"/>6. Basis construction<text:bookmark-end text:name="basis-construction"/></text:h>
      <text:p text:style-name="First_20_paragraph"><text:span text:style-name="T1">6.1 </text:span>The basis implementation shall construct raw first-kind Chebyshev values by recurrence rather than by unstable explicit powers.</text:p>
      <text:p text:style-name="Text_20_body"><text:span text:style-name="T1">6.2 </text:span>Layer and within-row indices shall initially map linearly and monotonically to coordinates in the closed interval from -1 to 1.</text:p>
      <text:p text:style-name="Text_20_body"><text:span text:style-name="T1">6.3 </text:span>The raw sampled Chebyshev columns shall be converted to a deterministic discrete orthonormal basis by reduced QR decomposition.</text:p>
      <text:p text:style-name="Text_20_body"><text:span text:style-name="T1">6.4 </text:span>Column signs after QR shall be normalised deterministically so that repeated construction under identical geometry yields identical bases.</text:p>
      <text:p text:style-name="Text_20_body"><text:span text:style-name="T1">6.5 </text:span>The QR-based basis shall preserve the discrete span of the selected Chebyshev terms.</text:p>
      <text:p text:style-name="Text_20_body"><text:span text:style-name="T1">6.6 </text:span>Basis construction shall occur in a numerically conservative dtype, initially float64 on CPU unless measured cost or compatibility requires a documented alternative.</text:p>
      <text:p text:style-name="Text_20_body"><text:span text:style-name="T1">6.7 </text:span>The runtime basis buffer may be cast to float32 after construction and shall be converted to the operation dtype only at the materialisation boundary where necessary.</text:p>
      <text:p text:style-name="Text_20_body"><text:span text:style-name="T1">6.8 </text:span>The implementation shall verify finiteness, expected shape, full column rank, approximate column orthonormality, and deterministic reproduction.</text:p>
      <text:p text:style-name="Text_20_body"><text:span text:style-name="T1">6.9 </text:span>Distinct row bases shall be cached by the tuple of row width, row order, basis version, device, and runtime dtype.</text:p>
      <text:p text:style-name="Text_20_body"><text:span text:style-name="T1">6.10 </text:span>The depth basis shall be shared by all generated families in one model instance.</text:p>
      <text:p text:style-name="Text_20_body"><text:span text:style-name="T1">6.11 </text:span>Basis buffers shall be non-persistent so that checkpoints store model coefficients rather than reproducible fixed tables.</text:p>
      <text:p text:style-name="Text_20_body"><text:span text:style-name="T1">6.12 </text:span>The implementation shall measure basis-construction time and peak temporary memory for Q_f values up to at least 1024 before accepting the QR strategy for the full sweep.</text:p>
      <text:p text:style-name="Text_20_body"><text:span text:style-name="T1">6.13 </text:span>If reduced QR proves operationally unacceptable, any replacement shall preserve the same sampled span, deterministic behavior, and conditioning tests and shall be documented before use.</text:p>
      <text:h text:style-name="Heading_20_1" text:outline-level="1"><text:bookmark-start text:name="compact-coefficient-state"/>7. Compact coefficient state<text:bookmark-end text:name="compact-coefficient-state"/></text:h>
      <text:p text:style-name="First_20_paragraph"><text:span text:style-name="T1">7.1 </text:span>The sheet trajectory module shall own one learned coefficient tensor for each generated tensor family.</text:p>
      <text:p text:style-name="Text_20_body"><text:span text:style-name="T1">7.2 </text:span>For a matrix family with R_f output rows, the coefficient shape shall be R_f by P by Q_f.</text:p>
      <text:p text:style-name="Text_20_body"><text:span text:style-name="T1">7.3 </text:span>The attention input projection shall use one packed family with coefficient shape 3d by P by Q_d unless later profiling justifies a split implementation that is mathematically equivalent.</text:p>
      <text:p text:style-name="Text_20_body"><text:span text:style-name="T1">7.4 </text:span>The attention output projection shall use coefficient shape d by P by Q_d.</text:p>
      <text:p text:style-name="Text_20_body"><text:span text:style-name="T1">7.5 </text:span>The MLP expansion projection shall use coefficient shape 4d by P by Q_d.</text:p>
      <text:p text:style-name="Text_20_body"><text:span text:style-name="T1">7.6 </text:span>The MLP contraction projection shall use coefficient shape d by P by Q_4d.</text:p>
      <text:p text:style-name="Text_20_body"><text:span text:style-name="T1">7.7 </text:span>Repeated vector families represented by sheets shall use one output row and a row width equal to the vector length.</text:p>
      <text:p text:style-name="Text_20_body"><text:span text:style-name="T1">7.8 </text:span>Family metadata shall record semantic type, output rows, row width, row order, initialization scale, and weight-decay classification.</text:p>
      <text:p text:style-name="Text_20_body"><text:span text:style-name="T1">7.9 </text:span>The implementation shall derive parameter counts directly from coefficient tensor shapes and shall cross-check them against analytical formulas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RowCell" office:value-type="string">
            <text:p text:style-name="Table_20_Contents"><text:span text:style-name="T1">Family</text:span></text:p>
          </table:table-cell>
          <table:table-cell table:style-name="TableRowCell" office:value-type="string">
            <text:p text:style-name="Table_20_Contents"><text:span text:style-name="T1">Rows</text:span></text:p>
          </table:table-cell>
          <table:table-cell table:style-name="TableRowCell" office:value-type="string">
            <text:p text:style-name="Table_20_Contents"><text:span text:style-name="T1">Row width</text:span></text:p>
          </table:table-cell>
          <table:table-cell table:style-name="TableRowCell" office:value-type="string">
            <text:p text:style-name="Table_20_Contents"><text:span text:style-name="T1">Coefficient shape at P16/Q128</text:span></text:p>
          </table:table-cell>
          <table:table-cell table:style-name="TableRowCell" office:value-type="string">
            <text:p text:style-name="Table_20_Contents"><text:span text:style-name="T1">Coefficient count</text:span></text:p>
          </table:table-cell>
        </table:table-row>
        <table:table-row>
          <table:table-cell table:style-name="TableRowCell" office:value-type="string">
            <text:p text:style-name="Table_20_Contents">Attention input projection</text:p>
          </table:table-cell>
          <table:table-cell table:style-name="TableRowCell" office:value-type="string">
            <text:p text:style-name="Table_20_Contents">2304</text:p>
          </table:table-cell>
          <table:table-cell table:style-name="TableRowCell" office:value-type="string">
            <text:p text:style-name="Table_20_Contents">768</text:p>
          </table:table-cell>
          <table:table-cell table:style-name="TableRowCell" office:value-type="string">
            <text:p text:style-name="Table_20_Contents">[2304, 16, 128]</text:p>
          </table:table-cell>
          <table:table-cell table:style-name="TableRowCell" office:value-type="string">
            <text:p text:style-name="Table_20_Contents">4,718,592</text:p>
          </table:table-cell>
        </table:table-row>
        <table:table-row>
          <table:table-cell table:style-name="TableRowCell" office:value-type="string">
            <text:p text:style-name="Table_20_Contents">Attention output projection</text:p>
          </table:table-cell>
          <table:table-cell table:style-name="TableRowCell" office:value-type="string">
            <text:p text:style-name="Table_20_Contents">768</text:p>
          </table:table-cell>
          <table:table-cell table:style-name="TableRowCell" office:value-type="string">
            <text:p text:style-name="Table_20_Contents">768</text:p>
          </table:table-cell>
          <table:table-cell table:style-name="TableRowCell" office:value-type="string">
            <text:p text:style-name="Table_20_Contents">[768, 16, 128]</text:p>
          </table:table-cell>
          <table:table-cell table:style-name="TableRowCell" office:value-type="string">
            <text:p text:style-name="Table_20_Contents">1,572,864</text:p>
          </table:table-cell>
        </table:table-row>
        <table:table-row>
          <table:table-cell table:style-name="TableRowCell" office:value-type="string">
            <text:p text:style-name="Table_20_Contents">MLP expansion</text:p>
          </table:table-cell>
          <table:table-cell table:style-name="TableRowCell" office:value-type="string">
            <text:p text:style-name="Table_20_Contents">3072</text:p>
          </table:table-cell>
          <table:table-cell table:style-name="TableRowCell" office:value-type="string">
            <text:p text:style-name="Table_20_Contents">768</text:p>
          </table:table-cell>
          <table:table-cell table:style-name="TableRowCell" office:value-type="string">
            <text:p text:style-name="Table_20_Contents">[3072, 16, 128]</text:p>
          </table:table-cell>
          <table:table-cell table:style-name="TableRowCell" office:value-type="string">
            <text:p text:style-name="Table_20_Contents">6,291,456</text:p>
          </table:table-cell>
        </table:table-row>
        <table:table-row>
          <table:table-cell table:style-name="TableRowCell" office:value-type="string">
            <text:p text:style-name="Table_20_Contents">MLP contraction</text:p>
          </table:table-cell>
          <table:table-cell table:style-name="TableRowCell" office:value-type="string">
            <text:p text:style-name="Table_20_Contents">768</text:p>
          </table:table-cell>
          <table:table-cell table:style-name="TableRowCell" office:value-type="string">
            <text:p text:style-name="Table_20_Contents">3072</text:p>
          </table:table-cell>
          <table:table-cell table:style-name="TableRowCell" office:value-type="string">
            <text:p text:style-name="Table_20_Contents">[768, 16, 512]</text:p>
          </table:table-cell>
          <table:table-cell table:style-name="TableRowCell" office:value-type="string">
            <text:p text:style-name="Table_20_Contents">6,291,456</text:p>
          </table:table-cell>
        </table:table-row>
        <table:table-row>
          <table:table-cell table:style-name="TableRowCell" office:value-type="string">
            <text:p text:style-name="Table_20_Contents">Large-matrix total</text:p>
          </table:table-cell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18,874,368</text:p>
          </table:table-cell>
        </table:table-row>
      </table:table>
      <text:p text:style-name="First_20_paragraph"><text:span text:style-name="T1">7.10 </text:span>No generated L-by-R_f-by-C_f tensor shall be registered as a parameter or persistent buffer.</text:p>
      <text:h text:style-name="Heading_20_1" text:outline-level="1"><text:bookmark-start text:name="layer-materialisation"/>8. Layer materialisation<text:bookmark-end text:name="layer-materialisation"/></text:h>
      <text:p text:style-name="First_20_paragraph"><text:span text:style-name="T1">8.1 </text:span>The reference materialisation path shall evaluate one family for one logical layer from the compact coefficient tensor and fixed basis rows.</text:p>
      <text:p text:style-name="Text_20_body"><text:span text:style-name="T1">8.2 </text:span>For family f and logical layer l, the implementation shall first mix the depth axis.</text:p>
      <text:p text:style-name="P2">mixed_f = einsum(“p,rpq-&gt;rq”, depth_basis[l, :], coefficients_f)</text:p>
      <text:p text:style-name="First_20_paragraph"><text:span text:style-name="T1">8.3 </text:span>The implementation shall then generate the conventional matrix for that logical layer.</text:p>
      <text:p text:style-name="P3">weight_f = mixed_f @ transpose(row_basis_f)</text:p>
      <text:p text:style-name="First_20_paragraph"><text:span text:style-name="T1">8.4 </text:span>The resulting weight_f shall have shape R_f by C_f and shall be numerically equivalent to evaluating every row sheet at the selected depth.</text:p>
      <text:p text:style-name="Text_20_body"><text:span text:style-name="T1">8.5 </text:span>The implementation shall materialise only families required by the current logical block.</text:p>
      <text:p text:style-name="Text_20_body"><text:span text:style-name="T1">8.6 </text:span>Generated tensors shall be ephemeral and shall remain connected to the compact coefficient graph for autograd.</text:p>
      <text:p text:style-name="Text_20_body"><text:span text:style-name="T1">8.7 </text:span>The reference implementation may use einsum, tensordot, or equivalent matrix operations, but the chosen expression shall have an explicit shape contract and unit tests.</text:p>
      <text:p text:style-name="Text_20_body"><text:span text:style-name="T1">8.8 </text:span>A batched or fused implementation may replace the reference path only after numerical and gradient equivalence are established.</text:p>
      <text:p text:style-name="Text_20_body"><text:span text:style-name="T1">8.9 </text:span>The materialisation API shall return conventional tensor shapes so that attention and MLP calculations remain recognisable and testable.</text:p>
      <text:h text:style-name="Heading_20_1" text:outline-level="1"><text:bookmark-start text:name="initialization"/>9. Initialization<text:bookmark-end text:name="initialization"/></text:h>
      <text:p text:style-name="First_20_paragraph"><text:span text:style-name="T1">9.1 </text:span>Initialization shall begin with all coefficient tensors set to exact zero.</text:p>
      <text:p text:style-name="Text_20_body"><text:span text:style-name="T1">9.2 </text:span>The first depth mode shall then be initialized so that generated matrix profiles are initially shared across logical depth while higher depth modes remain available to learn immediately.</text:p>
      <text:p text:style-name="Text_20_body"><text:span text:style-name="T1">9.3 </text:span>For a discrete orthonormal depth basis and row basis, the initial coefficient standard deviation for a target generated-weight standard deviation s_f shall initially be derived from the average basis-row energy.</text:p>
      <text:p text:style-name="P4">coefficient_std_f = s_f * sqrt(L * C_f / Q_f)</text:p>
      <text:p text:style-name="First_20_paragraph"><text:span text:style-name="T1">9.4 </text:span>The formula in 9.3 assumes that only the constant depth mode is active and that deterministic basis signs make the first depth column a positive constant.</text:p>
      <text:p text:style-name="Text_20_body"><text:span text:style-name="T1">9.5 </text:span>The attention input and MLP expansion families shall initially target the conventional nanoGPT standard deviation of 0.02 unless repository inspection identifies a baseline-specific value.</text:p>
      <text:p text:style-name="Text_20_body"><text:span text:style-name="T1">9.6 </text:span>The attention output and MLP contraction families shall retain nanoGPT residual-projection scaling, initially 0.02 divided by the square root of 2L.</text:p>
      <text:p text:style-name="Text_20_body"><text:span text:style-name="T1">9.7 </text:span>Layer-normalisation scale sheets, where used, shall generate exact ones at all logical sample positions at initialization.</text:p>
      <text:p text:style-name="Text_20_body"><text:span text:style-name="T1">9.8 </text:span>Bias sheets, where used, shall generate exact zeros at initialization.</text:p>
      <text:p text:style-name="Text_20_body"><text:span text:style-name="T1">9.9 </text:span>Initialization tests shall measure generated-weight mean, RMS, standard deviation, endpoint behavior, and layer-to-layer equality under the shared-depth initial mode.</text:p>
      <text:p text:style-name="Text_20_body"><text:span text:style-name="T1">9.10 </text:span>The acceptable generated-weight distribution tolerance shall be fixed in the test plan after a small numerical study of basis leverage across supported Q_f values.</text:p>
      <text:p text:style-name="Text_20_body"><text:span text:style-name="T1">9.11 </text:span>If endpoint leverage produces unacceptable initialization outliers, the remedy shall be documented and shall preserve the governing basis-span requirements.</text:p>
      <text:p text:style-name="Text_20_body"><text:span text:style-name="T1">9.12 </text:span>The implementation shall not allocate a complete dense logical block stack merely to initialize compact coefficients.</text:p>
      <text:h text:style-name="Heading_20_1" text:outline-level="1"><text:bookmark-start text:name="sheet-model-integration"/>10. Sheet model integration<text:bookmark-end text:name="sheet-model-integration"/></text:h>
      <text:p text:style-name="First_20_paragraph"><text:span text:style-name="T1">10.1 </text:span>The sheet model shall retain nanoGPT token embeddings, positional embeddings, final layer normalization, tied language-model head, causal attention semantics, residual connections, dropout, and cross-entropy behavior.</text:p>
      <text:p text:style-name="Text_20_body"><text:span text:style-name="T1">10.2 </text:span>The persistent ModuleList of independent dense transformer blocks shall be replaced in the sheet model by one compact sheet trajectory module and an indexed logical-layer execution loop.</text:p>
      <text:p text:style-name="Text_20_body"><text:span text:style-name="T1">10.3 </text:span>The dense GPT class shall remain available and shall not allocate sheet coefficient tensors.</text:p>
      <text:p text:style-name="Text_20_body"><text:span text:style-name="T1">10.4 </text:span>The sheet logical block shall use functional PyTorch operations with generated tensors rather than constructing persistent nn.Linear modules for each logical layer.</text:p>
      <text:p text:style-name="Text_20_body"><text:span text:style-name="T1">10.5 </text:span>Attention shall continue to use the retained scaled-dot-product attention path where supported by the nanoGPT baseline.</text:p>
      <text:p text:style-name="Text_20_body"><text:span text:style-name="T1">10.6 </text:span>The packed query-key-value output shall be split into q, k, and v activations exactly as in the dense baseline.</text:p>
      <text:p text:style-name="Text_20_body"><text:span text:style-name="T1">10.7 </text:span>The sheet model forward method shall return logits and next-token cross-entropy in the same interface shape as the dense model.</text:p>
      <text:p text:style-name="Text_20_body"><text:span text:style-name="T1">10.8 </text:span>Reference execution shall initially run logical layers sequentially without activation checkpointing so that correctness failures remain observable.</text:p>
      <text:p text:style-name="Text_20_body"><text:span text:style-name="T1">10.9 </text:span>Model startup reporting shall distinguish persistent parameters, sheet coefficients, conventional non-sheet parameters, and dense-equivalent parameters.</text:p>
      <text:p text:style-name="Text_20_body"><text:span text:style-name="T1">10.10 </text:span>Model construction shall verify that no dense logical block stack exists in named parameters or state_dict.</text:p>
      <text:h text:style-name="Heading_20_1" text:outline-level="1"><text:bookmark-start text:name="optimizer-and-training-integration"/>11. Optimizer and training integration<text:bookmark-end text:name="optimizer-and-training-integration"/></text:h>
      <text:p text:style-name="First_20_paragraph"><text:span text:style-name="T1">11.1 </text:span>The shared training loop shall select the dense or sheet model from model_type while retaining identical data loading, scheduler, gradient accumulation, clipping, mixed precision, evaluation, and logging semantics.</text:p>
      <text:p text:style-name="Text_20_body"><text:span text:style-name="T1">11.2 </text:span>The initial sheet implementation shall use the same base learning-rate schedule as the matched dense run unless a controlled experiment explicitly changes it.</text:p>
      <text:p text:style-name="Text_20_body"><text:span text:style-name="T1">11.3 </text:span>Matrix-family sheet coefficients shall be assigned to weight-decayed optimizer groups.</text:p>
      <text:p text:style-name="Text_20_body"><text:span text:style-name="T1">11.4 </text:span>Layer-normalisation and bias sheet coefficients shall be assigned to non-decayed optimizer groups according to semantic family metadata rather than tensor dimensionality.</text:p>
      <text:p text:style-name="Text_20_body"><text:span text:style-name="T1">11.5 </text:span>Every trainable parameter shall appear in exactly one optimizer group.</text:p>
      <text:p text:style-name="Text_20_body"><text:span text:style-name="T1">11.6 </text:span>Optimizer group ordering and metadata shall be deterministic to permit checkpoint resume tests.</text:p>
      <text:p text:style-name="Text_20_body"><text:span text:style-name="T1">11.7 </text:span>The optimizer shall update compact coefficients directly; generated weights shall never be optimizer parameters.</text:p>
      <text:p text:style-name="Text_20_body"><text:span text:style-name="T1">11.8 </text:span>Completed optimizer updates shall use exact update-count semantics independent of gradient-accumulation microsteps.</text:p>
      <text:p text:style-name="Text_20_body"><text:span text:style-name="T1">11.9 </text:span>The data-sampling RNG shall be separated from model-construction RNG before controlled dense-versus-sheet runs are accepted.</text:p>
      <text:p text:style-name="Text_20_body"><text:span text:style-name="T1">11.10 </text:span>The first complete trainer shall support single-GPU execution before DDP work begins.</text:p>
      <text:h text:style-name="Heading_20_1" text:outline-level="1"><text:bookmark-start text:name="ephemeral-execution-and-memory-control"/>12. Ephemeral execution and memory control<text:bookmark-end text:name="ephemeral-execution-and-memory-control"/></text:h>
      <text:p text:style-name="First_20_paragraph"><text:span text:style-name="T1">12.1 </text:span>After reference correctness is established, the model shall add segmented activation-checkpointed execution for the indexed logical-layer stack.</text:p>
      <text:p text:style-name="Text_20_body"><text:span text:style-name="T1">12.2 </text:span>Checkpointing shall use the non-reentrant PyTorch path unless baseline compatibility forces a documented alternative.</text:p>
      <text:p text:style-name="Text_20_body"><text:span text:style-name="T1">12.3 </text:span>Checkpointing shall preserve RNG state so that dropout behavior agrees with reference execution under deterministic tests.</text:p>
      <text:p text:style-name="Text_20_body"><text:span text:style-name="T1">12.4 </text:span>The checkpoint segment size shall be configurable, including a disabled reference value.</text:p>
      <text:p text:style-name="Text_20_body"><text:span text:style-name="T1">12.5 </text:span>During backward recomputation, the required layer weights shall be regenerated from compact coefficients rather than retrieved from a stored dense stack.</text:p>
      <text:p text:style-name="Text_20_body"><text:span text:style-name="T1">12.6 </text:span>Evaluation and inference shall bypass training-only activation checkpoint recomputation.</text:p>
      <text:p text:style-name="Text_20_body"><text:span text:style-name="T1">12.7 </text:span>Memory telemetry shall distinguish model construction, optimizer allocation, first backward state allocation, and steady-state training peaks.</text:p>
      <text:p text:style-name="Text_20_body"><text:span text:style-name="T1">12.8 </text:span>The implementation shall verify that peak memory does not grow in proportion to persisting all L logical matrices.</text:p>
      <text:p text:style-name="Text_20_body"><text:span text:style-name="T1">12.9 </text:span>Performance optimization shall first target avoidable repeated basis conversion and materialisation overhead before considering custom kernels.</text:p>
      <text:p text:style-name="Text_20_body"><text:span text:style-name="T1">12.10 </text:span>Any caching of generated weights across logical layers shall be prohibited in the first memory-acceptance path.</text:p>
      <text:h text:style-name="Heading_20_1" text:outline-level="1"><text:bookmark-start text:name="checkpoint-resume-and-inference"/>13. Checkpoint, resume, and inference<text:bookmark-end text:name="checkpoint-resume-and-inference"/></text:h>
      <text:p text:style-name="First_20_paragraph"><text:span text:style-name="T1">13.1 </text:span>Sheet checkpoints shall identify model_type as thog2_sheet.</text:p>
      <text:p text:style-name="Text_20_body"><text:span text:style-name="T1">13.2 </text:span>Checkpoint model arguments shall include all sheet geometry, basis version, bias state, and model dimensions required for exact reconstruction.</text:p>
      <text:p text:style-name="Text_20_body"><text:span text:style-name="T1">13.3 </text:span>Fixed basis buffers shall be regenerated from configuration and shall not be required in persistent checkpoint state.</text:p>
      <text:p text:style-name="Text_20_body"><text:span text:style-name="T1">13.4 </text:span>Checkpoint save shall include compact model state, optimizer state, completed update count, best and latest validation state, scheduler state where applicable, and required RNG state.</text:p>
      <text:p text:style-name="Text_20_body"><text:span text:style-name="T1">13.5 </text:span>Resume shall validate requested model geometry before loading optimizer state.</text:p>
      <text:p text:style-name="Text_20_body"><text:span text:style-name="T1">13.6 </text:span>A geometry mismatch shall fail with a direct message rather than attempting automatic conversion.</text:p>
      <text:p text:style-name="Text_20_body"><text:span text:style-name="T1">13.7 </text:span>Execution-only activation-checkpoint settings may be changed on resume if model state is unaffected.</text:p>
      <text:p text:style-name="Text_20_body"><text:span text:style-name="T1">13.8 </text:span>sample.py shall reconstruct dense or sheet models from checkpoint metadata without a user-side conversion step.</text:p>
      <text:p text:style-name="Text_20_body"><text:span text:style-name="T1">13.9 </text:span>Sheet inference shall load compact coefficient state and shall not create or save a dense checkpoint.</text:p>
      <text:p text:style-name="Text_20_body"><text:span text:style-name="T1">13.10 </text:span>Inference controls shall retain prompt, sample count, continuation length, temperature, top-k, and seed support from the baseline workflow.</text:p>
      <text:h text:style-name="Heading_20_1" text:outline-level="1"><text:bookmark-start text:name="telemetry-and-diagnostics"/>14. Telemetry and diagnostics<text:bookmark-end text:name="telemetry-and-diagnostics"/></text:h>
      <text:p text:style-name="First_20_paragraph"><text:span text:style-name="T1">14.1 </text:span>The implementation shall report training and validation cross-entropy, completed updates, consumed tokens, throughput, elapsed time, and learning rate.</text:p>
      <text:p text:style-name="Text_20_body"><text:span text:style-name="T1">14.2 </text:span>The implementation shall report persistent parameters, dense-equivalent parameters, sheet coefficient parameters, and per-family counts.</text:p>
      <text:p text:style-name="Text_20_body"><text:span text:style-name="T1">14.3 </text:span>The implementation shall report peak allocated and reserved GPU memory at documented phases.</text:p>
      <text:p text:style-name="Text_20_body"><text:span text:style-name="T1">14.4 </text:span>Coefficient RMS and gradient norm shall be reported by family at logging cadence.</text:p>
      <text:p text:style-name="Text_20_body"><text:span text:style-name="T1">14.5 </text:span>Depth-order energy shall be calculated from coefficient energy aggregated over output rows and row orders.</text:p>
      <text:p text:style-name="Text_20_body"><text:span text:style-name="T1">14.6 </text:span>Row-order energy shall be calculated from coefficient energy aggregated over output rows and depth orders.</text:p>
      <text:p text:style-name="Text_20_body"><text:span text:style-name="T1">14.7 </text:span>A documented high-order energy fraction shall expose whether capacity accumulates near either configured order limit.</text:p>
      <text:p text:style-name="Text_20_body"><text:span text:style-name="T1">14.8 </text:span>Sampled generated-weight mean, RMS, standard deviation, and maximum absolute value shall be reported for selected layers and families.</text:p>
      <text:p text:style-name="Text_20_body"><text:span text:style-name="T1">14.9 </text:span>Optional finite-difference roughness shall compare adjacent trained layer samples and adjacent trained within-row samples without assigning semantics to off-grid coordinates.</text:p>
      <text:p text:style-name="Text_20_body"><text:span text:style-name="T1">14.10 </text:span>Basis condition and orthonormality diagnostics shall be recorded at model startup rather than every update.</text:p>
      <text:p text:style-name="Text_20_body"><text:span text:style-name="T1">14.11 </text:span>All diagnostic calculations shall be detached and shall not change gradients, optimizer state, or random-number streams used by training.</text:p>
      <text:h text:style-name="Heading_20_1" text:outline-level="1"><text:bookmark-start text:name="implementation-verification"/>15. Implementation verification<text:bookmark-end text:name="implementation-verification"/></text:h>
      <text:p text:style-name="First_20_paragraph"><text:span text:style-name="T1">15.1 </text:span>A separate test plan shall define the complete test inventory, tolerances, fixtures, and execution matrix.</text:p>
      <text:p text:style-name="Text_20_body"><text:span text:style-name="T1">15.2 </text:span>Each work package shall add or update tests before its completion gate is accepted.</text:p>
      <text:p text:style-name="Text_20_body"><text:span text:style-name="T1">15.3 </text:span>Core mathematical tests shall cover basis values, discrete span, rank, orthonormality, deterministic signs, shape validation, and row-order derivation.</text:p>
      <text:p text:style-name="Text_20_body"><text:span text:style-name="T1">15.4 </text:span>Materialisation tests shall compare the implementation against direct matrix evaluation on small exact geometries.</text:p>
      <text:p text:style-name="Text_20_body"><text:span text:style-name="T1">15.5 </text:span>A saturated small geometry with P equal to L and Q_f equal to C_f shall reproduce arbitrary sampled row sheets within numerical tolerance.</text:p>
      <text:p text:style-name="Text_20_body"><text:span text:style-name="T1">15.6 </text:span>Gradient tests shall prove finite non-zero gradients to every used coefficient family.</text:p>
      <text:p text:style-name="Text_20_body"><text:span text:style-name="T1">15.7 </text:span>Initialization tests shall verify family-specific generated-weight statistics and exact LayerNorm-one and bias-zero behavior where applicable.</text:p>
      <text:p text:style-name="Text_20_body"><text:span text:style-name="T1">15.8 </text:span>Reference and checkpointed execution shall be compared under deterministic conditions.</text:p>
      <text:p text:style-name="Text_20_body"><text:span text:style-name="T1">15.9 </text:span>Checkpoint round-trip, resume, direct compact inference, dense-path regression, single-GPU smoke, and DDP smoke shall be mandatory before implementation completion.</text:p>
      <text:p text:style-name="Text_20_body"><text:span text:style-name="T1">15.10 </text:span>Source-guard tests shall verify the absence of persistent dense logical block parameters and compliance with required THOG source markers in modified nanoGPT files.</text:p>
      <text:h text:style-name="Heading_20_1" text:outline-level="1"><text:bookmark-start text:name="implementation-work-packages"/>16. Implementation work packages<text:bookmark-end text:name="implementation-work-packages"/></text:h>
      <text:p text:style-name="First_20_paragraph"><text:span text:style-name="T1">16.1 </text:span>The following work packages define the intended technical sequence. The later staging plan may group or split them into different commits or pull requests.</text:p>
      <text:h text:style-name="Heading_20_2" text:outline-level="2"><text:bookmark-start text:name="work-packages-0-4"/>16.2 Work packages 0-4<text:bookmark-end text:name="work-packages-0-4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RowCell" office:value-type="string">
            <text:p text:style-name="Table_20_Contents"><text:span text:style-name="T1">WP</text:span></text:p>
          </table:table-cell>
          <table:table-cell table:style-name="TableRowCell" office:value-type="string">
            <text:p text:style-name="Table_20_Contents"><text:span text:style-name="T1">Name</text:span></text:p>
          </table:table-cell>
          <table:table-cell table:style-name="TableRowCell" office:value-type="string">
            <text:p text:style-name="Table_20_Contents"><text:span text:style-name="T1">Primary work</text:span></text:p>
          </table:table-cell>
          <table:table-cell table:style-name="TableRowCell" office:value-type="string">
            <text:p text:style-name="Table_20_Contents"><text:span text:style-name="T1">Completion gate</text:span></text:p>
          </table:table-cell>
        </table:table-row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Baseline capture</text:p>
          </table:table-cell>
          <table:table-cell table:style-name="TableRowCell" office:value-type="string">
            <text:p text:style-name="Table_20_Contents">Clone, record commit/environment, run dense CPU and GPU smokes, freeze comparison evidence.</text:p>
          </table:table-cell>
          <table:table-cell table:style-name="TableRowCell" office:value-type="string">
            <text:p text:style-name="Table_20_Contents">Clean baseline; reproducible dense smoke; no sheet code.</text:p>
      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Basis and geometry core</text:p>
          </table:table-cell>
          <table:table-cell table:style-name="TableRowCell" office:value-type="string">
            <text:p text:style-name="Table_20_Contents">Implement coordinates, Chebyshev recurrence, QR basis, Q scaling, family geometry, analytical counts.</text:p>
          </table:table-cell>
          <table:table-cell table:style-name="TableRowCell" office:value-type="string">
            <text:p text:style-name="Table_20_Contents">Mathematical and validation tests pass through Q=1024.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Compact trajectory state</text:p>
          </table:table-cell>
          <table:table-cell table:style-name="TableRowCell" office:value-type="string">
            <text:p text:style-name="Table_20_Contents">Implement coefficient containers, basis sharing, family metadata, materialisation API.</text:p>
          </table:table-cell>
          <table:table-cell table:style-name="TableRowCell" office:value-type="string">
            <text:p text:style-name="Table_20_Contents">Shape, direct-equation, saturated-basis, state-schema, and gradient tests pass.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Reference sheet model</text:p>
          </table:table-cell>
          <table:table-cell table:style-name="TableRowCell" office:value-type="string">
            <text:p text:style-name="Table_20_Contents">Implement functional sheet block and SheetGPT; retain dense GPT; sequential reference forward/backward.</text:p>
          </table:table-cell>
          <table:table-cell table:style-name="TableRowCell" office:value-type="string">
            <text:p text:style-name="Table_20_Contents">CPU reference model trains for representative updates; dense regressions pass.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Initialization and optimizer</text:p>
          </table:table-cell>
          <table:table-cell table:style-name="TableRowCell" office:value-type="string">
            <text:p text:style-name="Table_20_Contents">Implement family initialization, semantic decay grouping, counts, startup reports.</text:p>
          </table:table-cell>
          <table:table-cell table:style-name="TableRowCell" office:value-type="string">
            <text:p text:style-name="Table_20_Contents">Generated statistics and optimizer coverage tests pass.</text:p>
          </table:table-cell>
        </table:table-row>
      </table:table>
      <text:h text:style-name="Heading_20_2" text:outline-level="2"><text:bookmark-start text:name="work-packages-5-9"/>16.3 Work packages 5-9<text:bookmark-end text:name="work-packages-5-9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RowCell" office:value-type="string">
            <text:p text:style-name="Table_20_Contents"><text:span text:style-name="T1">WP</text:span></text:p>
          </table:table-cell>
          <table:table-cell table:style-name="TableRowCell" office:value-type="string">
            <text:p text:style-name="Table_20_Contents"><text:span text:style-name="T1">Name</text:span></text:p>
          </table:table-cell>
          <table:table-cell table:style-name="TableRowCell" office:value-type="string">
            <text:p text:style-name="Table_20_Contents"><text:span text:style-name="T1">Primary work</text:span></text:p>
          </table:table-cell>
          <table:table-cell table:style-name="TableRowCell" office:value-type="string">
            <text:p text:style-name="Table_20_Contents"><text:span text:style-name="T1">Completion gate</text:span>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Shared trainer and checkpoints</text:p>
          </table:table-cell>
          <table:table-cell table:style-name="TableRowCell" office:value-type="string">
            <text:p text:style-name="Table_20_Contents">Add model_type selection, save/resume metadata, exact updates, deterministic data controls.</text:p>
          </table:table-cell>
          <table:table-cell table:style-name="TableRowCell" office:value-type="string">
            <text:p text:style-name="Table_20_Contents">Dense and sheet single-GPU smoke, checkpoint round-trip, resume pass.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Checkpointed ephemeral execution</text:p>
          </table:table-cell>
          <table:table-cell table:style-name="TableRowCell" office:value-type="string">
            <text:p text:style-name="Table_20_Contents">Port indexed segmented checkpointing, RNG preservation, memory phase telemetry.</text:p>
          </table:table-cell>
          <table:table-cell table:style-name="TableRowCell" office:value-type="string">
            <text:p text:style-name="Table_20_Contents">Reference equivalence and bounded-memory GPU tests pass.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Inference and diagnostics</text:p>
          </table:table-cell>
          <table:table-cell table:style-name="TableRowCell" office:value-type="string">
            <text:p text:style-name="Table_20_Contents">Checkpoint-driven sample path, run naming, W&amp;B/console telemetry, coefficient-order diagnostics.</text:p>
          </table:table-cell>
          <table:table-cell table:style-name="TableRowCell" office:value-type="string">
            <text:p text:style-name="Table_20_Contents">Compact checkpoint generates text; metrics finite; naming unambiguous.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DDP and target geometry</text:p>
          </table:table-cell>
          <table:table-cell table:style-name="TableRowCell" office:value-type="string">
            <text:p text:style-name="Table_20_Contents">DDP integration, target L144/D768/P16/Q128 smoke, Q512 row basis, performance profiling.</text:p>
          </table:table-cell>
          <table:table-cell table:style-name="TableRowCell" office:value-type="string">
            <text:p text:style-name="Table_20_Contents">No deadlock/divergence; target geometry completes bounded update sequence.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Controlled pilot and as-built</text:p>
          </table:table-cell>
          <table:table-cell table:style-name="TableRowCell" office:value-type="string">
            <text:p text:style-name="Table_20_Contents">Matched dense/sheet pilot, document deviations, final regression, as-built documentation.</text:p>
          </table:table-cell>
          <table:table-cell table:style-name="TableRowCell" office:value-type="string">
            <text:p text:style-name="Table_20_Contents">Implementation acceptance package complete; scientific claims remain qualified.</text:p>
          </table:table-cell>
        </table:table-row>
      </table:table>
      <text:p text:style-name="First_20_paragraph"><text:span text:style-name="T1">16.4 </text:span>No work package shall be considered complete solely because its code imports or a single smoke run starts.</text:p>
      <text:p text:style-name="Text_20_body"><text:span text:style-name="T1">16.5 </text:span>A failed gate shall be resolved in the same work package or documented as a blocking defect before later work proceeds.</text:p>
      <text:h text:style-name="Heading_20_1" text:outline-level="1"><text:bookmark-start text:name="controlled-pilot-configuration"/>17. Controlled pilot configuration<text:bookmark-end text:name="controlled-pilot-configuration"/></text:h>
      <text:p text:style-name="First_20_paragraph"><text:span text:style-name="T1">17.1 </text:span>The first scientific pilot shall not commence until functional acceptance through work package 8 is complete.</text:p>
      <text:p text:style-name="Text_20_body"><text:span text:style-name="T1">17.2 </text:span>The principal sheet pilot shall use P equal to 16, Q_d equal to 128, and Q_4d equal to 512 at the selected L144/D768 logical geometry where hardware permits.</text:p>
      <text:p text:style-name="Text_20_body"><text:span text:style-name="T1">17.3 </text:span>The first row-capacity sweep should bracket the principal configuration with Q_d values 64 and 256 and corresponding 4d values 256 and 1024.</text:p>
      <text:p text:style-name="Text_20_body"><text:span text:style-name="T1">17.4 </text:span>Dense and sheet runs shall use the same dataset, logical geometry, context length, batch trace, validation sample, optimizer schedule, completed update count, and consumed token count except for architecture-required differences.</text:p>
      <text:p text:style-name="Text_20_body"><text:span text:style-name="T1">17.5 </text:span>The pilot shall compare validation loss against updates, tokens, and wall-clock time.</text:p>
      <text:p text:style-name="Text_20_body"><text:span text:style-name="T1">17.6 </text:span>The pilot shall also report throughput, peak memory, persistent parameters, dense-equivalent parameters, and coefficient-order utilization.</text:p>
      <text:p text:style-name="Text_20_body"><text:span text:style-name="T1">17.7 </text:span>A low-order failure shall trigger the planned capacity sweep before the sheet hypothesis is rejected.</text:p>
      <text:p text:style-name="Text_20_body"><text:span text:style-name="T1">17.8 </text:span>A configuration requiring Q_d close to full row width to train usefully shall be treated as evidence against useful rowwise compression.</text:p>
      <text:p text:style-name="Text_20_body"><text:span text:style-name="T1">17.9 </text:span>Pilot outcomes shall not be generalized beyond the tested geometry, dataset, and training budget without further evidence.</text:p>
      <text:h text:style-name="Heading_20_1" text:outline-level="1"><text:bookmark-start text:name="deliverables-and-completion-criteria"/>18. Deliverables and completion criteria<text:bookmark-end text:name="deliverables-and-completion-criteria"/></text:h>
      <text:p text:style-name="First_20_paragraph"><text:span text:style-name="T1">18.1 </text:span>The implementation deliverable shall include source code, tests, configuration controls, checkpoint and inference paths, telemetry, and user-facing run instructions.</text:p>
      <text:p text:style-name="Text_20_body"><text:span text:style-name="T1">18.2 </text:span>The repository shall include the requirements specification, this implementation plan, the later test plan, the later staging plan, and an as-built document.</text:p>
      <text:p text:style-name="Text_20_body"><text:span text:style-name="T1">18.3 </text:span>The dense nanoGPT path shall remain operational and independently selectable.</text:p>
      <text:p text:style-name="Text_20_body"><text:span text:style-name="T1">18.4 </text:span>The sheet model shall store compact coefficient state and shall not persist the full logical block stack.</text:p>
      <text:p text:style-name="Text_20_body"><text:span text:style-name="T1">18.5 </text:span>Reference and checkpointed sheet execution shall be operational.</text:p>
      <text:p text:style-name="Text_20_body"><text:span text:style-name="T1">18.6 </text:span>Single-GPU and DDP training, checkpoint save, resume, and direct compact-checkpoint inference shall be operational.</text:p>
      <text:p text:style-name="Text_20_body"><text:span text:style-name="T1">18.7 </text:span>The complete regression suite shall pass on the accepted implementation commit.</text:p>
      <text:p text:style-name="Text_20_body"><text:span text:style-name="T1">18.8 </text:span>Target-geometry evidence shall demonstrate bounded memory and finite training behavior for a documented update count.</text:p>
      <text:p text:style-name="Text_20_body"><text:span text:style-name="T1">18.9 </text:span>All implementation deviations from the governing requirements and this plan shall be recorded in the as-built document and, where architectural, in a specification amendment.</text:p>
      <text:p text:style-name="Text_20_body"><text:span text:style-name="T1">18.10 </text:span>Implementation completion shall not claim that Chebyshev Sheet matches or exceeds dense nanoGPT quality.</text:p>
      <text:h text:style-name="Heading_20_1" text:outline-level="1"><text:bookmark-start text:name="deferred-decisions-and-change-control"/>19. Deferred decisions and change control<text:bookmark-end text:name="deferred-decisions-and-change-control"/></text:h>
      <text:p text:style-name="First_20_paragraph"><text:span text:style-name="T1">19.1 </text:span>Learned row coordinates, learned permutations, coordinate warping, multiple sheets per row, Vermeer, and three-dimensional Chebyshev volumes are deferred.</text:p>
      <text:p text:style-name="Text_20_body"><text:span text:style-name="T1">19.2 </text:span>Changing the fixed horizontal coordinate hypothesis shall require a versioned requirements amendment rather than an unrecorded implementation shortcut.</text:p>
      <text:p text:style-name="Text_20_body"><text:span text:style-name="T1">19.3 </text:span>Changing the sole cross-entropy objective shall require a versioned requirements amendment.</text:p>
      <text:p text:style-name="Text_20_body"><text:span text:style-name="T1">19.4 </text:span>Changing from independent output-row sheets to shared row coefficients or a flattened mega-sheet shall require a versioned requirements amendment.</text:p>
      <text:p text:style-name="Text_20_body"><text:span text:style-name="T1">19.5 </text:span>Replacing QR-orthogonalised sampled Chebyshev bases with a mathematically equivalent stable basis implementation may be handled as an implementation-plan amendment if the represented span and configuration semantics remain unchanged.</text:p>
      <text:p text:style-name="Text_20_body"><text:span text:style-name="T1">19.6 </text:span>Custom CUDA or Triton kernels shall be considered only after profiling identifies materialisation as a dominant cost in a correct end-to-end implementation.</text:p>
      <text:p text:style-name="Text_20_body"><text:span text:style-name="T1">19.7 </text:span>Any optimization shall preserve the reference path for correctness comparison until the optimized path has equivalent test coverage.</text:p>
      <text:p text:style-name="Text_20_body"><text:span text:style-name="T1">19.8 </text:span>The implementation plan shall be revised after repository inspection if baseline nanoGPT structure or current PyTorch interfaces materially differ from the assumptions recorded here.</text:p>
      <text:h text:style-name="Heading_20_1" text:outline-level="1"><text:bookmark-start text:name="immediate-next-actions"/>20. Immediate next actions<text:bookmark-end text:name="immediate-next-actions"/></text:h>
      <text:p text:style-name="First_20_paragraph"><text:span text:style-name="T1">20.1 </text:span>Complete and merge the ongoing Vermeer enhancement without interaction from thog2 work.</text:p>
      <text:p text:style-name="Text_20_body"><text:span text:style-name="T1">20.2 </text:span>Create the thog2 GitHub repository as a fresh nanoGPT clone.</text:p>
      <text:p text:style-name="Text_20_body"><text:span text:style-name="T1">20.3 </text:span>Provide repository access and identify the intended upstream baseline commit if it is not the repository default.</text:p>
      <text:p text:style-name="Text_20_body"><text:span text:style-name="T1">20.4 </text:span>Add the requirements specification and this implementation plan to thog2 in a documentation-only change.</text:p>
      <text:p text:style-name="Text_20_body"><text:span text:style-name="T1">20.5 </text:span>Prepare the separate Chebyshev Sheet Test Plan.</text:p>
      <text:p text:style-name="Text_20_body"><text:span text:style-name="T1">20.6 </text:span>Prepare the separate Chebyshev Sheet Staging Plan with minimum sensible implementation stages and explicit stop conditions.</text:p>
      <text:p text:style-name="Text_20_body"><text:span text:style-name="T1">20.7 </text:span>Commence work package 0 only after repository state and access are confirm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7-02T01:12:41Z</meta:creation-date>
    <dc:date>2026-07-02T01:12:41Z</dc:date>
  </office:meta>
</office:document-meta>
</file>