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547*"/>
    </style:style>
    <style:style style:name="Table1.B" style:family="table-column">
      <style:table-column-properties style:rel-column-width="46987*"/>
    </style:style>
    <style:style style:name="Table2" style:family="table">
      <style:table-properties table:align="center" style:rel-width="100%"/>
    </style:style>
    <style:style style:name="Table2.A" style:family="table-column">
      <style:table-column-properties style:rel-column-width="3016*"/>
    </style:style>
    <style:style style:name="Table2.B" style:family="table-column">
      <style:table-column-properties style:rel-column-width="9597*"/>
    </style:style>
    <style:style style:name="Table2.C" style:family="table-column">
      <style:table-column-properties style:rel-column-width="28517*"/>
    </style:style>
    <style:style style:name="Table2.D" style:family="table-column">
      <style:table-column-properties style:rel-column-width="24404*"/>
    </style:style>
    <style:style style:name="Table3" style:family="table">
      <style:table-properties table:align="center" style:rel-width="100%"/>
    </style:style>
    <style:style style:name="Table3.A" style:family="table-column">
      <style:table-column-properties style:rel-column-width="13454*"/>
    </style:style>
    <style:style style:name="Table3.B" style:family="table-column">
      <style:table-column-properties style:rel-column-width="29512*"/>
    </style:style>
    <style:style style:name="Table3.C" style:family="table-column">
      <style:table-column-properties style:rel-column-width="22568*"/>
    </style:style>
  </office:automatic-styles>
  <office:body>
    <office:text>
      <text:p text:style-name="Text_20_body">THOG2</text:p>
      <text:p text:style-name="Text_20_body">Chebyshev Sheet Staging Plan</text:p>
      <text:p text:style-name="Text_20_body">Version 0.1</text:p>
      <table:table table:name="Table1" table:style-name="Table1">
        <table:table-column table:style-name="Table1.A"/>
        <table:table-column table:style-name="Table1.B"/>
        <table:table-row>
          <table:table-cell table:style-name="TableRowCell" office:value-type="string">
            <text:p text:style-name="Table_20_Contents"><text:span text:style-name="T1">System</text:span></text:p>
          </table:table-cell>
          <table:table-cell table:style-name="TableRowCell" office:value-type="string">
            <text:p text:style-name="Table_20_Contents">thog2 enhancement of nanoGPT</text:p>
          </table:table-cell>
        </table:table-row>
        <table:table-row>
          <table:table-cell table:style-name="TableRowCell" office:value-type="string">
            <text:p text:style-name="Table_20_Contents"><text:span text:style-name="T1">Architecture designation</text:span></text:p>
          </table:table-cell>
          <table:table-cell table:style-name="TableRowCell" office:value-type="string">
            <text:p text:style-name="Table_20_Contents">Chebyshev Sheet</text:p>
          </table:table-cell>
        </table:table-row>
        <table:table-row>
          <table:table-cell table:style-name="TableRowCell" office:value-type="string">
            <text:p text:style-name="Table_20_Contents"><text:span text:style-name="T1">Governing specification</text:span></text:p>
          </table:table-cell>
          <table:table-cell table:style-name="TableRowCell" office:value-type="string">
            <text:p text:style-name="Table_20_Contents">THOG2 Chebyshev Sheet Requirements Specification v0.1</text:p>
          </table:table-cell>
        </table:table-row>
        <table:table-row>
          <table:table-cell table:style-name="TableRowCell" office:value-type="string">
            <text:p text:style-name="Table_20_Contents"><text:span text:style-name="T1">Implementation plan</text:span></text:p>
          </table:table-cell>
          <table:table-cell table:style-name="TableRowCell" office:value-type="string">
            <text:p text:style-name="Table_20_Contents">THOG2 Chebyshev Sheet Implementation Plan v0.1</text:p>
          </table:table-cell>
        </table:table-row>
        <table:table-row>
          <table:table-cell table:style-name="TableRowCell" office:value-type="string">
            <text:p text:style-name="Table_20_Contents"><text:span text:style-name="T1">Status</text:span></text:p>
          </table:table-cell>
          <table:table-cell table:style-name="TableRowCell" office:value-type="string">
            <text:p text:style-name="Table_20_Contents">Draft staging plan; repository implementation not commenced</text:p>
          </table:table-cell>
        </table:table-row>
        <table:table-row>
          <table:table-cell table:style-name="TableRowCell" office:value-type="string">
            <text:p text:style-name="Table_20_Contents"><text:span text:style-name="T1">Date</text:span></text:p>
          </table:table-cell>
          <table:table-cell table:style-name="TableRowCell" office:value-type="string">
            <text:p text:style-name="Table_20_Contents">2 July 2026</text:p>
          </table:table-cell>
        </table:table-row>
        <table:table-row>
          <table:table-cell table:style-name="TableRowCell" office:value-type="string">
            <text:p text:style-name="Table_20_Contents"><text:span text:style-name="T1">Planned repository</text:span></text:p>
          </table:table-cell>
          <table:table-cell table:style-name="TableRowCell" office:value-type="string">
            <text:p text:style-name="Table_20_Contents">thog2</text:p>
          </table:table-cell>
        </table:table-row>
        <table:table-row>
          <table:table-cell table:style-name="TableRowCell" office:value-type="string">
            <text:p text:style-name="Table_20_Contents"><text:span text:style-name="T1">Repository interaction</text:span></text:p>
          </table:table-cell>
          <table:table-cell table:style-name="TableRowCell" office:value-type="string">
            <text:p text:style-name="Table_20_Contents">None; this document is authored outside GitHub pending repository creation</text:p>
          </table:table-cell>
        </table:table-row>
      </table:table>
      <text:p text:style-name="First_20_paragraph">Non-normative note: This plan is deliberately external to the existing thog repository. It is intended to be added to thog2 after that repository is created and access is provided. No stage in this document authorises changes to the existing Vermeer work.</text:p>
      <text:h text:style-name="Heading_20_1" text:outline-level="1"><text:bookmark-start text:name="purpose-and-authority"/>1. Purpose and authority<text:bookmark-end text:name="purpose-and-authority"/></text:h>
      <text:p text:style-name="First_20_paragraph"><text:span text:style-name="T1">1.1 </text:span>This document divides implementation of the Chebyshev Sheet architecture into the minimum sensible sequence of independently reviewable and testable stages.</text:p>
      <text:p text:style-name="Text_20_body"><text:span text:style-name="T1">1.2 </text:span>The governing functional requirements are contained in THOG2 Chebyshev Sheet Requirements Specification v0.1.</text:p>
      <text:p text:style-name="Text_20_body"><text:span text:style-name="T1">1.3 </text:span>The planned technical design is contained in THOG2 Chebyshev Sheet Implementation Plan v0.1.</text:p>
      <text:p text:style-name="Text_20_body"><text:span text:style-name="T1">1.4 </text:span>Where this staging plan conflicts with the governing requirements specification, the requirements specification shall prevail.</text:p>
      <text:p text:style-name="Text_20_body"><text:span text:style-name="T1">1.5 </text:span>Where this staging plan conflicts with the implementation plan on sequencing only, this staging plan shall prevail until a versioned amendment resolves the conflict.</text:p>
      <text:p text:style-name="Text_20_body"><text:span text:style-name="T1">1.6 </text:span>This document defines stage scope, prerequisites, required evidence, exit gates, stop conditions, branch boundaries, and merge boundaries.</text:p>
      <text:p text:style-name="Text_20_body"><text:span text:style-name="T1">1.7 </text:span>This document does not define the complete test inventory or numerical tolerances; those shall be governed by the later Chebyshev Sheet Test Plan.</text:p>
      <text:p text:style-name="Text_20_body"><text:span text:style-name="T1">1.8 </text:span>A stage shall not be treated as complete merely because its code imports, a forward pass starts, or a short training command does not crash.</text:p>
      <text:h text:style-name="Heading_20_1" text:outline-level="1"><text:bookmark-start text:name="staging-objectives"/>2. Staging objectives<text:bookmark-end text:name="staging-objectives"/></text:h>
      <text:p text:style-name="First_20_paragraph"><text:span text:style-name="T1">2.1 </text:span>Each stage shall leave the repository executable, testable, and suitable for review.</text:p>
      <text:p text:style-name="Text_20_body"><text:span text:style-name="T1">2.2 </text:span>Each stage shall establish one coherent capability and shall avoid including speculative work from later stages.</text:p>
      <text:p text:style-name="Text_20_body"><text:span text:style-name="T1">2.3 </text:span>Mathematical correctness shall be established before model integration.</text:p>
      <text:p text:style-name="Text_20_body"><text:span text:style-name="T1">2.4 </text:span>CPU reference correctness shall be established before activation checkpointing, GPU performance work, or DDP work.</text:p>
      <text:p text:style-name="Text_20_body"><text:span text:style-name="T1">2.5 </text:span>The dense nanoGPT path shall remain operational after every merged stage.</text:p>
      <text:p text:style-name="Text_20_body"><text:span text:style-name="T1">2.6 </text:span>The sheet architecture shall remain non-default until Stage 6 acceptance is complete.</text:p>
      <text:p text:style-name="Text_20_body"><text:span text:style-name="T1">2.7 </text:span>Scientific quality claims shall be deferred until Stage 6 and shall not be used to waive an earlier correctness gate.</text:p>
      <text:p text:style-name="Text_20_body"><text:span text:style-name="T1">2.8 </text:span>No stage shall modify or depend at runtime on the existing thog repository.</text:p>
      <text:p text:style-name="Text_20_body"><text:span text:style-name="T1">2.9 </text:span>No stage shall disturb completion or merge of the separate Vermeer enhancement.</text:p>
      <text:h text:style-name="Heading_20_1" text:outline-level="1"><text:bookmark-start text:name="branch-commit-and-pull-request-strategy"/>3. Branch, commit, and pull-request strategy<text:bookmark-end text:name="branch-commit-and-pull-request-strategy"/></text:h>
      <text:p text:style-name="First_20_paragraph"><text:span text:style-name="T1">3.1 </text:span>Stage 0 shall begin only after the thog2 repository has been created as a clean nanoGPT clone and repository access has been provided.</text:p>
      <text:p text:style-name="Text_20_body"><text:span text:style-name="T1">3.2 </text:span>Each stage shall use a fresh branch created from the current accepted default branch after the preceding stage has been merged.</text:p>
      <text:p text:style-name="Text_20_body"><text:span text:style-name="T1">3.3 </text:span>Stages shall execute sequentially. Parallel implementation branches shall not be used for dependent stages.</text:p>
      <text:p text:style-name="Text_20_body"><text:span text:style-name="T1">3.4 </text:span>The provisional branch naming convention shall be shown below.</text:p>
      <text:p text:style-name="P1">docs/sheet-stage-0-baseline feature/sheet-stage-1-core feature/sheet-stage-2-reference-model feature/sheet-stage-3-training-lifecycle feature/sheet-stage-4-ephemeral-inference feature/sheet-stage-5-gpu-ddp experiment/sheet-stage-6-pilot</text:p>
      <text:p text:style-name="First_20_paragraph"><text:span text:style-name="T1">3.5 </text:span>Final branch names may be shortened after repository inspection, but stage numbering and scope shall remain unambiguous.</text:p>
      <text:p text:style-name="Text_20_body"><text:span text:style-name="T1">3.6 </text:span>Each stage shall normally produce one pull request to the default branch.</text:p>
      <text:p text:style-name="Text_20_body"><text:span text:style-name="T1">3.7 </text:span>Working commits may be used within a branch, but the pull request history shall remain intelligible and shall not contain unrelated experiments or generated artifacts.</text:p>
      <text:p text:style-name="Text_20_body"><text:span text:style-name="T1">3.8 </text:span>A stage pull request shall identify its governing stage, list changed files, state exclusions, report tests, record unresolved risks, and state whether all exit gates are satisfied.</text:p>
      <text:p text:style-name="Text_20_body"><text:span text:style-name="T1">3.9 </text:span>The next stage branch shall not be created from an unmerged predecessor unless an explicit recovery decision is recorded.</text:p>
      <text:p text:style-name="Text_20_body"><text:span text:style-name="T1">3.10 </text:span>After merge, the stage branch should be deleted and the accepted merge commit shall become the baseline for the next stage.</text:p>
      <text:p text:style-name="Text_20_body"><text:span text:style-name="T1">3.11 </text:span>All modifications to original nanoGPT source shall retain superseded lines as commented source where required and shall use the established THOG source markers.</text:p>
      <text:h text:style-name="Heading_20_1" text:outline-level="1"><text:bookmark-start text:name="stage-summary"/>4. Stage summary<text:bookmark-end text:name="stage-summary"/></text:h>
      <table:table table:name="Table2" table:style-name="Table2">
        <table:table-column table:style-name="Table2.A"/>
        <table:table-column table:style-name="Table2.B"/>
        <table:table-column table:style-name="Table2.C"/>
        <table:table-column table:style-name="Table2.D"/>
        <table:table-row>
          <table:table-cell table:style-name="TableRowCell" office:value-type="string">
            <text:p text:style-name="Table_20_Contents"><text:span text:style-name="T1">Stage</text:span></text:p>
          </table:table-cell>
          <table:table-cell table:style-name="TableRowCell" office:value-type="string">
            <text:p text:style-name="Table_20_Contents"><text:span text:style-name="T1">Name</text:span></text:p>
          </table:table-cell>
          <table:table-cell table:style-name="TableRowCell" office:value-type="string">
            <text:p text:style-name="Table_20_Contents"><text:span text:style-name="T1">Primary scope</text:span></text:p>
          </table:table-cell>
          <table:table-cell table:style-name="TableRowCell" office:value-type="string">
            <text:p text:style-name="Table_20_Contents"><text:span text:style-name="T1">Principal exit gate</text:span></text:p>
          </table:table-cell>
        </table:table-row>
        <table:table-row>
          <table:table-cell table:style-name="TableRowCell" office:value-type="string">
            <text:p text:style-name="Table_20_Contents">0</text:p>
          </table:table-cell>
          <table:table-cell table:style-name="TableRowCell" office:value-type="string">
            <text:p text:style-name="Table_20_Contents">Baseline and documentation</text:p>
          </table:table-cell>
          <table:table-cell table:style-name="TableRowCell" office:value-type="string">
            <text:p text:style-name="Table_20_Contents">Capture pristine nanoGPT baseline, environment, dense controls, and add governing documents.</text:p>
          </table:table-cell>
          <table:table-cell table:style-name="TableRowCell" office:value-type="string">
            <text:p text:style-name="Table_20_Contents">Clean reproducible baseline and documentation-only merge.</text:p>
          </table:table-cell>
        </table:table-row>
        <table:table-row>
          <table:table-cell table:style-name="TableRowCell" office:value-type="string">
            <text:p text:style-name="Table_20_Contents">1</text:p>
          </table:table-cell>
          <table:table-cell table:style-name="TableRowCell" office:value-type="string">
            <text:p text:style-name="Table_20_Contents">Mathematical core</text:p>
          </table:table-cell>
          <table:table-cell table:style-name="TableRowCell" office:value-type="string">
            <text:p text:style-name="Table_20_Contents">Coordinates, bivariate Chebyshev bases, QR stabilization, geometry, Q scaling, counts.</text:p>
          </table:table-cell>
          <table:table-cell table:style-name="TableRowCell" office:value-type="string">
            <text:p text:style-name="Table_20_Contents">All mathematical tests pass through row order 1024.</text:p>
          </table:table-cell>
        </table:table-row>
        <table:table-row>
          <table:table-cell table:style-name="TableRowCell" office:value-type="string">
            <text:p text:style-name="Table_20_Contents">2</text:p>
          </table:table-cell>
          <table:table-cell table:style-name="TableRowCell" office:value-type="string">
            <text:p text:style-name="Table_20_Contents">Compact state and reference model</text:p>
          </table:table-cell>
          <table:table-cell table:style-name="TableRowCell" office:value-type="string">
            <text:p text:style-name="Table_20_Contents">Coefficient state, materialisation, initialization, optimizer groups, CPU SheetGPT.</text:p>
          </table:table-cell>
          <table:table-cell table:style-name="TableRowCell" office:value-type="string">
            <text:p text:style-name="Table_20_Contents">Reference forward/backward and short CPU training pass without dense block persistence.</text:p>
          </table:table-cell>
        </table:table-row>
        <table:table-row>
          <table:table-cell table:style-name="TableRowCell" office:value-type="string">
            <text:p text:style-name="Table_20_Contents">3</text:p>
          </table:table-cell>
          <table:table-cell table:style-name="TableRowCell" office:value-type="string">
            <text:p text:style-name="Table_20_Contents">Training lifecycle</text:p>
          </table:table-cell>
          <table:table-cell table:style-name="TableRowCell" office:value-type="string">
            <text:p text:style-name="Table_20_Contents">Shared trainer, architecture selection, checkpoints, resume, deterministic controls, single-GPU smoke.</text:p>
          </table:table-cell>
          <table:table-cell table:style-name="TableRowCell" office:value-type="string">
            <text:p text:style-name="Table_20_Contents">Dense and sheet save/resume and exact-update smokes pass.</text:p>
          </table:table-cell>
        </table:table-row>
        <table:table-row>
          <table:table-cell table:style-name="TableRowCell" office:value-type="string">
            <text:p text:style-name="Table_20_Contents">4</text:p>
          </table:table-cell>
          <table:table-cell table:style-name="TableRowCell" office:value-type="string">
            <text:p text:style-name="Table_20_Contents">Ephemeral execution and inference</text:p>
          </table:table-cell>
          <table:table-cell table:style-name="TableRowCell" office:value-type="string">
            <text:p text:style-name="Table_20_Contents">Segmented checkpointing, memory telemetry, compact inference, diagnostics, naming.</text:p>
          </table:table-cell>
          <table:table-cell table:style-name="TableRowCell" office:value-type="string">
            <text:p text:style-name="Table_20_Contents">Reference/checkpointed equivalence and compact-checkpoint text generation pass.</text:p>
          </table:table-cell>
        </table:table-row>
        <table:table-row>
          <table:table-cell table:style-name="TableRowCell" office:value-type="string">
            <text:p text:style-name="Table_20_Contents">5</text:p>
          </table:table-cell>
          <table:table-cell table:style-name="TableRowCell" office:value-type="string">
            <text:p text:style-name="Table_20_Contents">GPU, DDP, and target geometry</text:p>
          </table:table-cell>
          <table:table-cell table:style-name="TableRowCell" office:value-type="string">
            <text:p text:style-name="Table_20_Contents">DDP, bounded-memory execution, target L144/D768/P16/Q128 geometry, profiling.</text:p>
          </table:table-cell>
          <table:table-cell table:style-name="TableRowCell" office:value-type="string">
            <text:p text:style-name="Table_20_Contents">No deadlock or state divergence; target geometry completes accepted bounded run.</text:p>
          </table:table-cell>
        </table:table-row>
        <table:table-row>
          <table:table-cell table:style-name="TableRowCell" office:value-type="string">
            <text:p text:style-name="Table_20_Contents">6</text:p>
          </table:table-cell>
          <table:table-cell table:style-name="TableRowCell" office:value-type="string">
            <text:p text:style-name="Table_20_Contents">Controlled pilot and as-built</text:p>
          </table:table-cell>
          <table:table-cell table:style-name="TableRowCell" office:value-type="string">
            <text:p text:style-name="Table_20_Contents">Matched dense-versus-sheet pilot, row-capacity sweep decision, final regression, as-built.</text:p>
          </table:table-cell>
          <table:table-cell table:style-name="TableRowCell" office:value-type="string">
            <text:p text:style-name="Table_20_Contents">Evidence package complete; scientific conclusion stated with limits.</text:p>
          </table:table-cell>
        </table:table-row>
      </table:table>
      <text:p text:style-name="First_20_paragraph"><text:span text:style-name="T1">4.1 </text:span>The seven stages above are the minimum sensible grouping. Combining additional stages would mix distinct failure domains; splitting them further would create merge boundaries without independently useful capability.</text:p>
      <text:p text:style-name="Text_20_body"><text:span text:style-name="T1">4.2 </text:span>Internal checkpoints may be used within a stage, but they shall not be represented as accepted stages unless this document is amended.</text:p>
      <text:h text:style-name="Heading_20_1" text:outline-level="1"><text:bookmark-start text:name="stage-0---baseline-and-documentation"/>5. Stage 0 - Baseline and documentation<text:bookmark-end text:name="stage-0---baseline-and-documentation"/></text:h>
      <text:h text:style-name="Heading_20_2" text:outline-level="2"><text:bookmark-start text:name="objective"/>5.1 Objective<text:bookmark-end text:name="objective"/></text:h>
      <text:p text:style-name="First_20_paragraph"><text:span text:style-name="T1">5.1.1 </text:span>Stage 0 shall establish a trustworthy thog2 baseline before any Chebyshev Sheet runtime code is added.</text:p>
      <text:h text:style-name="Heading_20_2" text:outline-level="2"><text:bookmark-start text:name="entry-criteria"/>5.2 Entry criteria<text:bookmark-end text:name="entry-criteria"/></text:h>
      <text:p text:style-name="First_20_paragraph"><text:span text:style-name="T1">5.2.1 </text:span>The thog2 GitHub repository exists and is accessible.</text:p>
      <text:p text:style-name="Text_20_body"><text:span text:style-name="T1">5.2.2 </text:span>The repository is confirmed to be a fresh clone of the selected nanoGPT baseline.</text:p>
      <text:p text:style-name="Text_20_body"><text:span text:style-name="T1">5.2.3 </text:span>The selected upstream commit and default branch are identified.</text:p>
      <text:h text:style-name="Heading_20_2" text:outline-level="2"><text:bookmark-start text:name="scope"/>5.3 Scope<text:bookmark-end text:name="scope"/></text:h>
      <text:p text:style-name="First_20_paragraph"><text:span text:style-name="T1">5.3.1 </text:span>Record the upstream repository URL and exact baseline commit SHA.</text:p>
      <text:p text:style-name="Text_20_body"><text:span text:style-name="T1">5.3.2 </text:span>Record the Python, PyTorch, CUDA, driver, operating-system, and GPU environment used for baseline evidence.</text:p>
      <text:p text:style-name="Text_20_body"><text:span text:style-name="T1">5.3.3 </text:span>Run and record a CPU import or minimal-forward smoke for the dense model.</text:p>
      <text:p text:style-name="Text_20_body"><text:span text:style-name="T1">5.3.4 </text:span>Run and record a short single-GPU dense training smoke where hardware is available.</text:p>
      <text:p text:style-name="Text_20_body"><text:span text:style-name="T1">5.3.5 </text:span>Add the requirements specification, implementation plan, staging plan, and later test plan as documentation-only changes.</text:p>
      <text:p text:style-name="Text_20_body"><text:span text:style-name="T1">5.3.6 </text:span>Add or verify ignore rules for datasets, checkpoints, logs, generated text, W&amp;B state, and local environment files.</text:p>
      <text:p text:style-name="Text_20_body"><text:span text:style-name="T1">5.3.7 </text:span>Do not add sheet runtime code in Stage 0.</text:p>
      <text:h text:style-name="Heading_20_2" text:outline-level="2"><text:bookmark-start text:name="required-evidence"/>5.4 Required evidence<text:bookmark-end text:name="required-evidence"/></text:h>
      <text:p text:style-name="First_20_paragraph"><text:span text:style-name="T1">5.4.1 </text:span>A baseline environment record shall be committed or attached to the pull request.</text:p>
      <text:p text:style-name="Text_20_body"><text:span text:style-name="T1">5.4.2 </text:span>Dense smoke commands and their outcomes shall be recorded exactly.</text:p>
      <text:p text:style-name="Text_20_body"><text:span text:style-name="T1">5.4.3 </text:span>Git status shall be clean after the accepted baseline commands, excluding documented ignored artifacts.</text:p>
      <text:h text:style-name="Heading_20_2" text:outline-level="2"><text:bookmark-start text:name="exit-gate"/>5.5 Exit gate<text:bookmark-end text:name="exit-gate"/></text:h>
      <text:p text:style-name="First_20_paragraph"><text:span text:style-name="T1">5.5.1 </text:span>The default branch reproduces the selected nanoGPT baseline behavior.</text:p>
      <text:p text:style-name="Text_20_body"><text:span text:style-name="T1">5.5.2 </text:span>The governing documents are available in thog2 without modifying runtime behavior.</text:p>
      <text:p text:style-name="Text_20_body"><text:span text:style-name="T1">5.5.3 </text:span>The Stage 0 pull request is merged before Stage 1 begins.</text:p>
      <text:h text:style-name="Heading_20_2" text:outline-level="2"><text:bookmark-start text:name="stop-conditions"/>5.6 Stop conditions<text:bookmark-end text:name="stop-conditions"/></text:h>
      <text:p text:style-name="First_20_paragraph"><text:span text:style-name="T1">5.6.1 </text:span>Stop if the repository is not a clean or identifiable nanoGPT baseline.</text:p>
      <text:p text:style-name="Text_20_body"><text:span text:style-name="T1">5.6.2 </text:span>Stop if the dense baseline cannot complete its agreed smoke tests.</text:p>
      <text:p text:style-name="Text_20_body"><text:span text:style-name="T1">5.6.3 </text:span>Stop if unreviewed code from thog or Vermeer has already been mixed into the repository.</text:p>
      <text:h text:style-name="Heading_20_1" text:outline-level="1"><text:bookmark-start text:name="stage-1---mathematical-core"/>6. Stage 1 - Mathematical core<text:bookmark-end text:name="stage-1---mathematical-core"/></text:h>
      <text:h text:style-name="Heading_20_2" text:outline-level="2"><text:bookmark-start text:name="objective-1"/>6.1 Objective<text:bookmark-end text:name="objective-1"/></text:h>
      <text:p text:style-name="First_20_paragraph"><text:span text:style-name="T1">6.1.1 </text:span>Stage 1 shall establish the universal, model-independent mathematics of the depth-row Chebyshev sheet.</text:p>
      <text:h text:style-name="Heading_20_2" text:outline-level="2"><text:bookmark-start text:name="entry-criteria-1"/>6.2 Entry criteria<text:bookmark-end text:name="entry-criteria-1"/></text:h>
      <text:p text:style-name="First_20_paragraph"><text:span text:style-name="T1">6.2.1 </text:span>Stage 0 is merged and the default branch is clean.</text:p>
      <text:p text:style-name="Text_20_body"><text:span text:style-name="T1">6.2.2 </text:span>The later Test Plan defines or confirms basis tolerances before Stage 1 acceptance.</text:p>
      <text:h text:style-name="Heading_20_2" text:outline-level="2"><text:bookmark-start text:name="scope-1"/>6.3 Scope<text:bookmark-end text:name="scope-1"/></text:h>
      <text:p text:style-name="First_20_paragraph"><text:span text:style-name="T1">6.3.1 </text:span>Implement normalized depth coordinates and fixed left-to-right within-row coordinates.</text:p>
      <text:p text:style-name="Text_20_body"><text:span text:style-name="T1">6.3.2 </text:span>Implement first-kind Chebyshev recurrence without explicit monomial powers.</text:p>
      <text:p text:style-name="Text_20_body"><text:span text:style-name="T1">6.3.3 </text:span>Implement deterministic reduced-QR stabilization of sampled basis columns.</text:p>
      <text:p text:style-name="Text_20_body"><text:span text:style-name="T1">6.3.4 </text:span>Implement deterministic QR column-sign normalization.</text:p>
      <text:p text:style-name="Text_20_body"><text:span text:style-name="T1">6.3.5 </text:span>Implement row-order derivation from model width and Q_d.</text:p>
      <text:p text:style-name="Text_20_body"><text:span text:style-name="T1">6.3.6 </text:span>Implement family geometry for attention input, attention output, MLP expansion, MLP contraction, and selected repeated vector families.</text:p>
      <text:p text:style-name="Text_20_body"><text:span text:style-name="T1">6.3.7 </text:span>Implement analytical persistent-parameter and dense-equivalent count helpers.</text:p>
      <text:p text:style-name="Text_20_body"><text:span text:style-name="T1">6.3.8 </text:span>Implement basis caching by geometry, basis version, device, and runtime dtype where useful.</text:p>
      <text:p text:style-name="Text_20_body"><text:span text:style-name="T1">6.3.9 </text:span>Do not implement SheetGPT, training integration, activation checkpointing, or inference in Stage 1.</text:p>
      <text:h text:style-name="Heading_20_2" text:outline-level="2"><text:bookmark-start text:name="required-tests-and-evidence"/>6.4 Required tests and evidence<text:bookmark-end text:name="required-tests-and-evidence"/></text:h>
      <text:p text:style-name="First_20_paragraph"><text:span text:style-name="T1">6.4.1 </text:span>Test coordinate endpoints, monotonicity, and expected sample count.</text:p>
      <text:p text:style-name="Text_20_body"><text:span text:style-name="T1">6.4.2 </text:span>Test recurrence values against a trusted direct reference on small orders.</text:p>
      <text:p text:style-name="Text_20_body"><text:span text:style-name="T1">6.4.3 </text:span>Test basis shape, finiteness, rank, orthonormality, deterministic reconstruction, and deterministic signs.</text:p>
      <text:p text:style-name="Text_20_body"><text:span text:style-name="T1">6.4.4 </text:span>Test Q scaling for widths d and 4d, including the principal values 128 and 512 at d equal to 768.</text:p>
      <text:p text:style-name="Text_20_body"><text:span text:style-name="T1">6.4.5 </text:span>Test row orders through at least Q equal to 1024 for numerical validity and practical construction cost.</text:p>
      <text:p text:style-name="Text_20_body"><text:span text:style-name="T1">6.4.6 </text:span>Cross-check analytical parameter counts against explicit tensor-shape products.</text:p>
      <text:h text:style-name="Heading_20_2" text:outline-level="2"><text:bookmark-start text:name="exit-gate-1"/>6.5 Exit gate<text:bookmark-end text:name="exit-gate-1"/></text:h>
      <text:p text:style-name="First_20_paragraph"><text:span text:style-name="T1">6.5.1 </text:span>Every mathematical test passes on CPU.</text:p>
      <text:p text:style-name="Text_20_body"><text:span text:style-name="T1">6.5.2 </text:span>Repeated construction of an identical basis is bitwise identical where the chosen dtype and platform permit, or agrees within a documented deterministic tolerance otherwise.</text:p>
      <text:p text:style-name="Text_20_body"><text:span text:style-name="T1">6.5.3 </text:span>Basis construction through Q equal to 1024 is finite and operationally acceptable.</text:p>
      <text:p text:style-name="Text_20_body"><text:span text:style-name="T1">6.5.4 </text:span>No model or training code depends on incomplete Stage 1 behavior.</text:p>
      <text:h text:style-name="Heading_20_2" text:outline-level="2"><text:bookmark-start text:name="stop-conditions-1"/>6.6 Stop conditions<text:bookmark-end text:name="stop-conditions-1"/></text:h>
      <text:p text:style-name="First_20_paragraph"><text:span text:style-name="T1">6.6.1 </text:span>Stop if the basis loses rank or produces non-finite values at required orders.</text:p>
      <text:p text:style-name="Text_20_body"><text:span text:style-name="T1">6.6.2 </text:span>Stop if deterministic sign normalization cannot make checkpoint reconstruction stable.</text:p>
      <text:p text:style-name="Text_20_body"><text:span text:style-name="T1">6.6.3 </text:span>Stop if the Q equal to 512 or Q equal to 1024 basis is too costly to construct or store for the intended runtime, pending an implementation-plan amendment.</text:p>
      <text:p text:style-name="Text_20_body"><text:span text:style-name="T1">6.6.4 </text:span>Stop if parameter-count formulas and instantiated shapes disagree.</text:p>
      <text:h text:style-name="Heading_20_1" text:outline-level="1"><text:bookmark-start text:name="stage-2---compact-state-and-reference-model"/>7. Stage 2 - Compact state and reference model<text:bookmark-end text:name="stage-2---compact-state-and-reference-model"/></text:h>
      <text:h text:style-name="Heading_20_2" text:outline-level="2"><text:bookmark-start text:name="objective-2"/>7.1 Objective<text:bookmark-end text:name="objective-2"/></text:h>
      <text:p text:style-name="First_20_paragraph"><text:span text:style-name="T1">7.1.1 </text:span>Stage 2 shall produce the first complete correctness-first Chebyshev Sheet language model on CPU.</text:p>
      <text:h text:style-name="Heading_20_2" text:outline-level="2"><text:bookmark-start text:name="entry-criteria-2"/>7.2 Entry criteria<text:bookmark-end text:name="entry-criteria-2"/></text:h>
      <text:p text:style-name="First_20_paragraph"><text:span text:style-name="T1">7.2.1 </text:span>Stage 1 is merged and all mathematical tests pass on the accepted default branch.</text:p>
      <text:h text:style-name="Heading_20_2" text:outline-level="2"><text:bookmark-start text:name="scope-2"/>7.3 Scope<text:bookmark-end text:name="scope-2"/></text:h>
      <text:p text:style-name="First_20_paragraph"><text:span text:style-name="T1">7.3.1 </text:span>Implement one compact coefficient tensor per generated tensor family with shape R_f by P by Q_f.</text:p>
      <text:p text:style-name="Text_20_body"><text:span text:style-name="T1">7.3.2 </text:span>Implement family metadata, semantic decay classification, basis ownership, and state-schema rules.</text:p>
      <text:p text:style-name="Text_20_body"><text:span text:style-name="T1">7.3.3 </text:span>Implement one-layer materialisation by depth-axis mixing followed by multiplication with the transposed row basis.</text:p>
      <text:p text:style-name="Text_20_body"><text:span text:style-name="T1">7.3.4 </text:span>Implement initialization that produces the intended nanoGPT-like generated-weight statistics without allocating a dense logical block stack.</text:p>
      <text:p text:style-name="Text_20_body"><text:span text:style-name="T1">7.3.5 </text:span>Implement semantic optimizer grouping for matrix, LayerNorm, and bias families used by the reference model.</text:p>
      <text:p text:style-name="Text_20_body"><text:span text:style-name="T1">7.3.6 </text:span>Implement the functional sheet transformer block and SheetGPT reference model.</text:p>
      <text:p text:style-name="Text_20_body"><text:span text:style-name="T1">7.3.7 </text:span>Execute logical layers sequentially without activation checkpointing.</text:p>
      <text:p text:style-name="Text_20_body"><text:span text:style-name="T1">7.3.8 </text:span>Retain the dense GPT implementation and its existing behavior.</text:p>
      <text:p text:style-name="Text_20_body"><text:span text:style-name="T1">7.3.9 </text:span>Use ordinary next-token cross-entropy as the sole model loss.</text:p>
      <text:p text:style-name="Text_20_body"><text:span text:style-name="T1">7.3.10 </text:span>Do not integrate checkpoint save/resume, DDP, compact inference, or target-scale GPU execution in Stage 2.</text:p>
      <text:h text:style-name="Heading_20_2" text:outline-level="2"><text:bookmark-start text:name="required-tests-and-evidence-1"/>7.4 Required tests and evidence<text:bookmark-end text:name="required-tests-and-evidence-1"/></text:h>
      <text:p text:style-name="First_20_paragraph"><text:span text:style-name="T1">7.4.1 </text:span>Compare materialisation against direct bivariate evaluation on small exact geometries.</text:p>
      <text:p text:style-name="Text_20_body"><text:span text:style-name="T1">7.4.2 </text:span>Use saturated small geometries with P equal to L and Q_f equal to C_f to demonstrate sampled-sheet completeness within tolerance.</text:p>
      <text:p text:style-name="Text_20_body"><text:span text:style-name="T1">7.4.3 </text:span>Verify that generated matrices have conventional nanoGPT shapes.</text:p>
      <text:p text:style-name="Text_20_body"><text:span text:style-name="T1">7.4.4 </text:span>Verify finite non-zero gradients to every active coefficient family.</text:p>
      <text:p text:style-name="Text_20_body"><text:span text:style-name="T1">7.4.5 </text:span>Verify initialization mean, standard deviation, RMS, endpoint behavior, shared-depth starting behavior, exact LayerNorm ones, and exact bias zeros where applicable.</text:p>
      <text:p text:style-name="Text_20_body"><text:span text:style-name="T1">7.4.6 </text:span>Verify that every trainable parameter appears in exactly one optimizer group.</text:p>
      <text:p text:style-name="Text_20_body"><text:span text:style-name="T1">7.4.7 </text:span>Verify that no persistent dense logical block stack appears in named parameters or state_dict.</text:p>
      <text:p text:style-name="Text_20_body"><text:span text:style-name="T1">7.4.8 </text:span>Run a tiny CPU forward/backward test and a short CPU optimization test showing finite loss and at least one completed parameter update.</text:p>
      <text:p text:style-name="Text_20_body"><text:span text:style-name="T1">7.4.9 </text:span>Run the dense nanoGPT regression tests affected by shared configuration or model-factory changes.</text:p>
      <text:h text:style-name="Heading_20_2" text:outline-level="2"><text:bookmark-start text:name="exit-gate-2"/>7.5 Exit gate<text:bookmark-end text:name="exit-gate-2"/></text:h>
      <text:p text:style-name="First_20_paragraph"><text:span text:style-name="T1">7.5.1 </text:span>A tiny SheetGPT completes forward, backward, optimizer step, and repeated training updates on CPU.</text:p>
      <text:p text:style-name="Text_20_body"><text:span text:style-name="T1">7.5.2 </text:span>All compact-state, materialisation, initialization, gradient, optimizer, state-schema, and dense-regression tests pass.</text:p>
      <text:p text:style-name="Text_20_body"><text:span text:style-name="T1">7.5.3 </text:span>Persistent and dense-equivalent parameter reporting agrees with analytical expectations.</text:p>
      <text:h text:style-name="Heading_20_2" text:outline-level="2"><text:bookmark-start text:name="stop-conditions-2"/>7.6 Stop conditions<text:bookmark-end text:name="stop-conditions-2"/></text:h>
      <text:p text:style-name="First_20_paragraph"><text:span text:style-name="T1">7.6.1 </text:span>Stop if the saturated-basis reconstruction test fails materially.</text:p>
      <text:p text:style-name="Text_20_body"><text:span text:style-name="T1">7.6.2 </text:span>Stop if gradients fail to reach any required coefficient family.</text:p>
      <text:p text:style-name="Text_20_body"><text:span text:style-name="T1">7.6.3 </text:span>Stop if initialization produces pathological outliers or unstable loss before the initialization policy is corrected and documented.</text:p>
      <text:p text:style-name="Text_20_body"><text:span text:style-name="T1">7.6.4 </text:span>Stop if the implementation requires persistent dense layer weights to obtain a functional forward pass.</text:p>
      <text:p text:style-name="Text_20_body"><text:span text:style-name="T1">7.6.5 </text:span>Stop if the dense model path changes numerically outside agreed regression tolerance.</text:p>
      <text:h text:style-name="Heading_20_1" text:outline-level="1"><text:bookmark-start text:name="stage-3---training-lifecycle"/>8. Stage 3 - Training lifecycle<text:bookmark-end text:name="stage-3---training-lifecycle"/></text:h>
      <text:h text:style-name="Heading_20_2" text:outline-level="2"><text:bookmark-start text:name="objective-3"/>8.1 Objective<text:bookmark-end text:name="objective-3"/></text:h>
      <text:p text:style-name="First_20_paragraph"><text:span text:style-name="T1">8.1.1 </text:span>Stage 3 shall make the reference sheet model trainable, checkpointable, resumable, and comparable through the shared nanoGPT training lifecycle.</text:p>
      <text:h text:style-name="Heading_20_2" text:outline-level="2"><text:bookmark-start text:name="entry-criteria-3"/>8.2 Entry criteria<text:bookmark-end text:name="entry-criteria-3"/></text:h>
      <text:p text:style-name="First_20_paragraph"><text:span text:style-name="T1">8.2.1 </text:span>Stage 2 is merged and the CPU reference model is accepted.</text:p>
      <text:h text:style-name="Heading_20_2" text:outline-level="2"><text:bookmark-start text:name="scope-3"/>8.3 Scope<text:bookmark-end text:name="scope-3"/></text:h>
      <text:p text:style-name="First_20_paragraph"><text:span text:style-name="T1">8.3.1 </text:span>Add explicit dense and thog2_sheet model selection to the shared trainer.</text:p>
      <text:p text:style-name="Text_20_body"><text:span text:style-name="T1">8.3.2 </text:span>Preserve identical data loading, gradient accumulation, mixed precision, scheduler, clipping, evaluation, and logging semantics where architecture does not require a difference.</text:p>
      <text:p text:style-name="Text_20_body"><text:span text:style-name="T1">8.3.3 </text:span>Implement exact completed-optimizer-update semantics.</text:p>
      <text:p text:style-name="Text_20_body"><text:span text:style-name="T1">8.3.4 </text:span>Separate data-sampling RNG from model-construction RNG for controlled comparisons.</text:p>
      <text:p text:style-name="Text_20_body"><text:span text:style-name="T1">8.3.5 </text:span>Implement sheet checkpoint save, load, resume, compatibility validation, and deterministic optimizer-group reconstruction.</text:p>
      <text:p text:style-name="Text_20_body"><text:span text:style-name="T1">8.3.6 </text:span>Record model type, sheet geometry, basis version, Q scaling rule, coefficient state, optimizer state, update count, and training arguments.</text:p>
      <text:p text:style-name="Text_20_body"><text:span text:style-name="T1">8.3.7 </text:span>Implement startup reporting for persistent parameters, sheet coefficients, conventional parameters, and dense-equivalent parameters.</text:p>
      <text:p text:style-name="Text_20_body"><text:span text:style-name="T1">8.3.8 </text:span>Add a small single-GPU reference-training path without activation checkpointing.</text:p>
      <text:p text:style-name="Text_20_body"><text:span text:style-name="T1">8.3.9 </text:span>Do not add DDP or target-scale L144/D768 execution in Stage 3.</text:p>
      <text:h text:style-name="Heading_20_2" text:outline-level="2"><text:bookmark-start text:name="required-tests-and-evidence-2"/>8.4 Required tests and evidence<text:bookmark-end text:name="required-tests-and-evidence-2"/></text:h>
      <text:p text:style-name="First_20_paragraph"><text:span text:style-name="T1">8.4.1 </text:span>Run dense and sheet trainer smokes using the same shared training loop.</text:p>
      <text:p text:style-name="Text_20_body"><text:span text:style-name="T1">8.4.2 </text:span>Verify checkpoint round-trip equality for model state and fixed-batch outputs.</text:p>
      <text:p text:style-name="Text_20_body"><text:span text:style-name="T1">8.4.3 </text:span>Verify resume restores optimizer state, completed update count, learning-rate schedule position, and deterministic group ordering.</text:p>
      <text:p text:style-name="Text_20_body"><text:span text:style-name="T1">8.4.4 </text:span>Verify incompatible model geometry or basis version fails with a direct diagnostic rather than silent reinterpretation.</text:p>
      <text:p text:style-name="Text_20_body"><text:span text:style-name="T1">8.4.5 </text:span>Verify two matched runs consume the same batch-index trace when configured with the same data seed.</text:p>
      <text:p text:style-name="Text_20_body"><text:span text:style-name="T1">8.4.6 </text:span>Run a short single-GPU sheet training smoke with finite forward, backward, optimizer state allocation, validation, checkpoint, and resume.</text:p>
      <text:p text:style-name="Text_20_body"><text:span text:style-name="T1">8.4.7 </text:span>Run dense-path regression tests after trainer modifications.</text:p>
      <text:h text:style-name="Heading_20_2" text:outline-level="2"><text:bookmark-start text:name="exit-gate-3"/>8.5 Exit gate<text:bookmark-end text:name="exit-gate-3"/></text:h>
      <text:p text:style-name="First_20_paragraph"><text:span text:style-name="T1">8.5.1 </text:span>Dense and sheet models both train through the shared trainer.</text:p>
      <text:p text:style-name="Text_20_body"><text:span text:style-name="T1">8.5.2 </text:span>A compact sheet checkpoint saves, reloads, resumes, and reproduces the accepted fixed-batch output within tolerance.</text:p>
      <text:p text:style-name="Text_20_body"><text:span text:style-name="T1">8.5.3 </text:span>The single-GPU reference smoke completes without activation checkpointing or DDP.</text:p>
      <text:h text:style-name="Heading_20_2" text:outline-level="2"><text:bookmark-start text:name="stop-conditions-3"/>8.6 Stop conditions<text:bookmark-end text:name="stop-conditions-3"/></text:h>
      <text:p text:style-name="First_20_paragraph"><text:span text:style-name="T1">8.6.1 </text:span>Stop if checkpoint state includes a persistent dense logical block stack.</text:p>
      <text:p text:style-name="Text_20_body"><text:span text:style-name="T1">8.6.2 </text:span>Stop if resume changes optimizer-group membership or learning-rate schedule position unexpectedly.</text:p>
      <text:p text:style-name="Text_20_body"><text:span text:style-name="T1">8.6.3 </text:span>Stop if architecture selection changes dense training behavior outside agreed tolerance.</text:p>
      <text:p text:style-name="Text_20_body"><text:span text:style-name="T1">8.6.4 </text:span>Stop if matched data traces cannot be made independent of model-construction RNG consumption.</text:p>
      <text:h text:style-name="Heading_20_1" text:outline-level="1"><text:bookmark-start text:name="stage-4---ephemeral-execution-and-inference"/>9. Stage 4 - Ephemeral execution and inference<text:bookmark-end text:name="stage-4---ephemeral-execution-and-inference"/></text:h>
      <text:h text:style-name="Heading_20_2" text:outline-level="2"><text:bookmark-start text:name="objective-4"/>9.1 Objective<text:bookmark-end text:name="objective-4"/></text:h>
      <text:p text:style-name="First_20_paragraph"><text:span text:style-name="T1">9.1.1 </text:span>Stage 4 shall establish memory-controlled training execution and direct inference from compact checkpoints.</text:p>
      <text:h text:style-name="Heading_20_2" text:outline-level="2"><text:bookmark-start text:name="entry-criteria-4"/>9.2 Entry criteria<text:bookmark-end text:name="entry-criteria-4"/></text:h>
      <text:p text:style-name="First_20_paragraph"><text:span text:style-name="T1">9.2.1 </text:span>Stage 3 is merged and reference checkpoint save/resume is accepted.</text:p>
      <text:h text:style-name="Heading_20_2" text:outline-level="2"><text:bookmark-start text:name="scope-4"/>9.3 Scope<text:bookmark-end text:name="scope-4"/></text:h>
      <text:p text:style-name="First_20_paragraph"><text:span text:style-name="T1">9.3.1 </text:span>Implement segmented indexed activation checkpointing for the logical-layer stack.</text:p>
      <text:p text:style-name="Text_20_body"><text:span text:style-name="T1">9.3.2 </text:span>Use non-reentrant checkpointing and preserve RNG state unless a documented baseline constraint requires another approach.</text:p>
      <text:p text:style-name="Text_20_body"><text:span text:style-name="T1">9.3.3 </text:span>Regenerate required generated weights during backward recomputation rather than retaining a dense layer stack.</text:p>
      <text:p text:style-name="Text_20_body"><text:span text:style-name="T1">9.3.4 </text:span>Make checkpoint segment size configurable, including a disabled reference mode.</text:p>
      <text:p text:style-name="Text_20_body"><text:span text:style-name="T1">9.3.5 </text:span>Implement compact-checkpoint inference and checkpoint-driven model reconstruction.</text:p>
      <text:p text:style-name="Text_20_body"><text:span text:style-name="T1">9.3.6 </text:span>Implement stable architecture-first run naming containing L, d, P, and Q_d.</text:p>
      <text:p text:style-name="Text_20_body"><text:span text:style-name="T1">9.3.7 </text:span>Implement detached console and W&amp;B diagnostics for coefficient RMS, gradients, order utilization, generated-weight statistics, and memory phases.</text:p>
      <text:p text:style-name="Text_20_body"><text:span text:style-name="T1">9.3.8 </text:span>Bypass training-only activation checkpointing during validation and inference.</text:p>
      <text:p text:style-name="Text_20_body"><text:span text:style-name="T1">9.3.9 </text:span>Do not add DDP in Stage 4.</text:p>
      <text:h text:style-name="Heading_20_2" text:outline-level="2"><text:bookmark-start text:name="required-tests-and-evidence-3"/>9.4 Required tests and evidence<text:bookmark-end text:name="required-tests-and-evidence-3"/></text:h>
      <text:p text:style-name="First_20_paragraph"><text:span text:style-name="T1">9.4.1 </text:span>Compare reference and checkpointed logits, losses, coefficient gradients, and completed optimizer updates under deterministic conditions.</text:p>
      <text:p text:style-name="Text_20_body"><text:span text:style-name="T1">9.4.2 </text:span>Verify dropout agreement under preserved RNG state.</text:p>
      <text:p text:style-name="Text_20_body"><text:span text:style-name="T1">9.4.3 </text:span>Verify memory phase telemetry for model construction, optimizer allocation, first backward allocation, and steady-state training.</text:p>
      <text:p text:style-name="Text_20_body"><text:span text:style-name="T1">9.4.4 </text:span>Verify evaluation and inference execute without checkpoint recomputation.</text:p>
      <text:p text:style-name="Text_20_body"><text:span text:style-name="T1">9.4.5 </text:span>Verify a compact sheet checkpoint generates text directly without dense conversion.</text:p>
      <text:p text:style-name="Text_20_body"><text:span text:style-name="T1">9.4.6 </text:span>Verify run names and artifact prefixes distinguish dense and sheet architectures and distinct P/Q configurations.</text:p>
      <text:p text:style-name="Text_20_body"><text:span text:style-name="T1">9.4.7 </text:span>Verify diagnostics are finite, detached, and do not perturb gradients or training RNG streams.</text:p>
      <text:h text:style-name="Heading_20_2" text:outline-level="2"><text:bookmark-start text:name="exit-gate-4"/>9.5 Exit gate<text:bookmark-end text:name="exit-gate-4"/></text:h>
      <text:p text:style-name="First_20_paragraph"><text:span text:style-name="T1">9.5.1 </text:span>Reference and checkpointed execution agree within the Test Plan tolerance.</text:p>
      <text:p text:style-name="Text_20_body"><text:span text:style-name="T1">9.5.2 </text:span>Memory telemetry demonstrates that no persistent full logical block stack is retained.</text:p>
      <text:p text:style-name="Text_20_body"><text:span text:style-name="T1">9.5.3 </text:span>A compact checkpoint generates text using the normal inference entry point.</text:p>
      <text:p text:style-name="Text_20_body"><text:span text:style-name="T1">9.5.4 </text:span>All Stage 4 regressions pass in both reference and checkpointed modes.</text:p>
      <text:h text:style-name="Heading_20_2" text:outline-level="2"><text:bookmark-start text:name="stop-conditions-4"/>9.6 Stop conditions<text:bookmark-end text:name="stop-conditions-4"/></text:h>
      <text:p text:style-name="First_20_paragraph"><text:span text:style-name="T1">9.6.1 </text:span>Stop if checkpointed execution changes gradients or optimizer updates outside tolerance.</text:p>
      <text:p text:style-name="Text_20_body"><text:span text:style-name="T1">9.6.2 </text:span>Stop if RNG preservation cannot reproduce reference dropout behavior.</text:p>
      <text:p text:style-name="Text_20_body"><text:span text:style-name="T1">9.6.3 </text:span>Stop if memory grows approximately as a persisted L-layer dense weight stack.</text:p>
      <text:p text:style-name="Text_20_body"><text:span text:style-name="T1">9.6.4 </text:span>Stop if inference requires materialising and retaining the complete dense model.</text:p>
      <text:h text:style-name="Heading_20_1" text:outline-level="1"><text:bookmark-start text:name="stage-5---gpu-ddp-and-target-geometry"/>10. Stage 5 - GPU, DDP, and target geometry<text:bookmark-end text:name="stage-5---gpu-ddp-and-target-geometry"/></text:h>
      <text:h text:style-name="Heading_20_2" text:outline-level="2"><text:bookmark-start text:name="objective-5"/>10.1 Objective<text:bookmark-end text:name="objective-5"/></text:h>
      <text:p text:style-name="First_20_paragraph"><text:span text:style-name="T1">10.1.1 </text:span>Stage 5 shall demonstrate operational training at representative and principal geometries, including distributed execution.</text:p>
      <text:h text:style-name="Heading_20_2" text:outline-level="2"><text:bookmark-start text:name="entry-criteria-5"/>10.2 Entry criteria<text:bookmark-end text:name="entry-criteria-5"/></text:h>
      <text:p text:style-name="First_20_paragraph"><text:span text:style-name="T1">10.2.1 </text:span>Stage 4 is merged and reference/checkpointed equivalence is accepted.</text:p>
      <text:p text:style-name="Text_20_body"><text:span text:style-name="T1">10.2.2 </text:span>The target hardware and DDP launch environment are identified.</text:p>
      <text:h text:style-name="Heading_20_2" text:outline-level="2"><text:bookmark-start text:name="scope-5"/>10.3 Scope<text:bookmark-end text:name="scope-5"/></text:h>
      <text:p text:style-name="First_20_paragraph"><text:span text:style-name="T1">10.3.1 </text:span>Implement DDP integration without changing compact model semantics.</text:p>
      <text:p text:style-name="Text_20_body"><text:span text:style-name="T1">10.3.2 </text:span>Verify deterministic parameter registration and optimizer-group construction on all ranks.</text:p>
      <text:p text:style-name="Text_20_body"><text:span text:style-name="T1">10.3.3 </text:span>Add per-rank memory and failure diagnostics sufficient to identify imbalance or deadlock.</text:p>
      <text:p text:style-name="Text_20_body"><text:span text:style-name="T1">10.3.4 </text:span>Run progressive GPU geometries before the principal target geometry.</text:p>
      <text:p text:style-name="Text_20_body"><text:span text:style-name="T1">10.3.5 </text:span>Exercise the principal L144/D768/P16/Q128 geometry, including Q equal to 512 for 4d-wide rows.</text:p>
      <text:p text:style-name="Text_20_body"><text:span text:style-name="T1">10.3.6 </text:span>Use the agreed head count and context length, initially H12 and context 256 unless the governing documents are amended.</text:p>
      <text:p text:style-name="Text_20_body"><text:span text:style-name="T1">10.3.7 </text:span>Profile basis construction, layer materialisation, forward, backward, optimizer, communication, and checkpoint recomputation costs.</text:p>
      <text:p text:style-name="Text_20_body"><text:span text:style-name="T1">10.3.8 </text:span>Optimize only measured bottlenecks and retain the tested reference path.</text:p>
      <text:h text:style-name="Heading_20_2" text:outline-level="2"><text:bookmark-start text:name="required-tests-and-evidence-4"/>10.4 Required tests and evidence<text:bookmark-end text:name="required-tests-and-evidence-4"/></text:h>
      <text:p text:style-name="First_20_paragraph"><text:span text:style-name="T1">10.4.1 </text:span>Run a single-GPU reference smoke and a single-GPU checkpointed smoke on a representative medium geometry.</text:p>
      <text:p text:style-name="Text_20_body"><text:span text:style-name="T1">10.4.2 </text:span>Run a multi-process DDP smoke and verify no deadlock, unused-parameter failure, rank divergence, or state-schema mismatch.</text:p>
      <text:p text:style-name="Text_20_body"><text:span text:style-name="T1">10.4.3 </text:span>Compare single-GPU and DDP completed-update behavior on a deterministic small fixture where practical.</text:p>
      <text:p text:style-name="Text_20_body"><text:span text:style-name="T1">10.4.4 </text:span>Run the principal target geometry for a documented bounded update count sufficient to allocate optimizer state and reach steady-state memory.</text:p>
      <text:p text:style-name="Text_20_body"><text:span text:style-name="T1">10.4.5 </text:span>Record peak allocated and reserved VRAM by rank and by lifecycle phase.</text:p>
      <text:p text:style-name="Text_20_body"><text:span text:style-name="T1">10.4.6 </text:span>Record update time, throughput, materialisation cost, and checkpoint-recomputation cost.</text:p>
      <text:p text:style-name="Text_20_body"><text:span text:style-name="T1">10.4.7 </text:span>Verify finite loss and gradients and at least a short-term downward training-loss trend at the principal geometry.</text:p>
      <text:h text:style-name="Heading_20_2" text:outline-level="2"><text:bookmark-start text:name="exit-gate-5"/>10.5 Exit gate<text:bookmark-end text:name="exit-gate-5"/></text:h>
      <text:p text:style-name="First_20_paragraph"><text:span text:style-name="T1">10.5.1 </text:span>Single-GPU and DDP smokes pass.</text:p>
      <text:p text:style-name="Text_20_body"><text:span text:style-name="T1">10.5.2 </text:span>The principal geometry completes its accepted bounded run without out-of-memory failure, deadlock, non-finite state, or persistent dense-weight retention.</text:p>
      <text:p text:style-name="Text_20_body"><text:span text:style-name="T1">10.5.3 </text:span>Performance and memory evidence is sufficient to design the controlled pilot.</text:p>
      <text:p text:style-name="Text_20_body"><text:span text:style-name="T1">10.5.4 </text:span>The complete regression suite passes on the proposed Stage 5 merge commit.</text:p>
      <text:h text:style-name="Heading_20_2" text:outline-level="2"><text:bookmark-start text:name="stop-conditions-5"/>10.6 Stop conditions<text:bookmark-end text:name="stop-conditions-5"/></text:h>
      <text:p text:style-name="First_20_paragraph"><text:span text:style-name="T1">10.6.1 </text:span>Stop if any rank constructs a different parameter set or optimizer grouping.</text:p>
      <text:p text:style-name="Text_20_body"><text:span text:style-name="T1">10.6.2 </text:span>Stop if DDP produces reproducible state divergence or deadlock attributable to the sheet architecture.</text:p>
      <text:p text:style-name="Text_20_body"><text:span text:style-name="T1">10.6.3 </text:span>Stop if principal-geometry memory is unbounded or defeats the compact-state objective.</text:p>
      <text:p text:style-name="Text_20_body"><text:span text:style-name="T1">10.6.4 </text:span>Stop if basis or materialisation cost dominates so severely that a measured implementation revision is required before scientific training.</text:p>
      <text:p text:style-name="Text_20_body"><text:span text:style-name="T1">10.6.5 </text:span>Stop before Stage 6 if the model cannot complete finite updates or show any learning signal at representative settings.</text:p>
      <text:h text:style-name="Heading_20_1" text:outline-level="1"><text:bookmark-start text:name="stage-6---controlled-pilot-and-as-built"/>11. Stage 6 - Controlled pilot and as-built<text:bookmark-end text:name="stage-6---controlled-pilot-and-as-built"/></text:h>
      <text:h text:style-name="Heading_20_2" text:outline-level="2"><text:bookmark-start text:name="objective-6"/>11.1 Objective<text:bookmark-end text:name="objective-6"/></text:h>
      <text:p text:style-name="First_20_paragraph"><text:span text:style-name="T1">11.1.1 </text:span>Stage 6 shall conduct the first controlled scientific evaluation and close the initial implementation with an as-built record.</text:p>
      <text:h text:style-name="Heading_20_2" text:outline-level="2"><text:bookmark-start text:name="entry-criteria-6"/>11.2 Entry criteria<text:bookmark-end text:name="entry-criteria-6"/></text:h>
      <text:p text:style-name="First_20_paragraph"><text:span text:style-name="T1">11.2.1 </text:span>Stage 5 is merged and all functional acceptance gates through target geometry are satisfied.</text:p>
      <text:p text:style-name="Text_20_body"><text:span text:style-name="T1">11.2.2 </text:span>The fixed training-batch trace or equivalent deterministic sampler, fixed validation sample, and formal run budget are agreed.</text:p>
      <text:h text:style-name="Heading_20_2" text:outline-level="2"><text:bookmark-start text:name="scope-6"/>11.3 Scope<text:bookmark-end text:name="scope-6"/></text:h>
      <text:p text:style-name="First_20_paragraph"><text:span text:style-name="T1">11.3.1 </text:span>Run matched dense and principal sheet configurations using equal logical geometry, dataset, context length, batch trace, validation sample, optimizer schedule, completed updates, and consumed tokens except for architecture-required differences.</text:p>
      <text:p text:style-name="Text_20_body"><text:span text:style-name="T1">11.3.2 </text:span>Use P equal to 16 and principal Q_d equal to 128 with Q_4d equal to 512 for the main sheet run.</text:p>
      <text:p text:style-name="Text_20_body"><text:span text:style-name="T1">11.3.3 </text:span>If the principal sheet run is stable but materially capacity-limited, run the planned Q_d bracket of 64, 128, and 256 with proportional 4d orders before rejecting the rowwise-sheet hypothesis.</text:p>
      <text:p text:style-name="Text_20_body"><text:span text:style-name="T1">11.3.4 </text:span>Compare validation loss against completed updates, consumed tokens, and wall-clock time.</text:p>
      <text:p text:style-name="Text_20_body"><text:span text:style-name="T1">11.3.5 </text:span>Report throughput, persistent parameters, dense-equivalent parameters, peak VRAM, coefficient-order utilization, and generated-weight diagnostics.</text:p>
      <text:p text:style-name="Text_20_body"><text:span text:style-name="T1">11.3.6 </text:span>Run the final complete regression suite on the accepted implementation commit.</text:p>
      <text:p text:style-name="Text_20_body"><text:span text:style-name="T1">11.3.7 </text:span>Write an as-built document identifying actual paths, configuration semantics, deviations, known limitations, accepted tests, and unresolved scientific questions.</text:p>
      <text:p text:style-name="Text_20_body"><text:span text:style-name="T1">11.3.8 </text:span>Update governing documents through versioned amendments where actual architecture differs materially from v0.1.</text:p>
      <text:h text:style-name="Heading_20_2" text:outline-level="2"><text:bookmark-start text:name="decision-rules"/>11.4 Decision rules<text:bookmark-end text:name="decision-rules"/></text:h>
      <text:p text:style-name="First_20_paragraph"><text:span text:style-name="T1">11.4.1 </text:span>A low-Q failure accompanied by clear improvement as Q increases shall be treated as capacity evidence rather than immediate falsification.</text:p>
      <text:p text:style-name="Text_20_body"><text:span text:style-name="T1">11.4.2 </text:span>A model requiring Q_d close to full row width for useful learning shall be treated as evidence against useful rowwise compression.</text:p>
      <text:p text:style-name="Text_20_body"><text:span text:style-name="T1">11.4.3 </text:span>A stable model with a modest quality penalty but major parameter or VRAM reduction shall be recorded as promising rather than declared superior.</text:p>
      <text:p text:style-name="Text_20_body"><text:span text:style-name="T1">11.4.4 </text:span>A result shall not be called positive if it depends on an uncontrolled data trace, validation sample, token budget, or optimizer difference.</text:p>
      <text:p text:style-name="Text_20_body"><text:span text:style-name="T1">11.4.5 </text:span>Failure of the first pilot shall not justify unplanned learned coordinates, row permutations, Vermeer, auxiliary losses, or 3D volumes inside the same stage.</text:p>
      <text:h text:style-name="Heading_20_2" text:outline-level="2"><text:bookmark-start text:name="exit-gate-6"/>11.5 Exit gate<text:bookmark-end text:name="exit-gate-6"/></text:h>
      <text:p text:style-name="First_20_paragraph"><text:span text:style-name="T1">11.5.1 </text:span>All controlled runs and their exact configurations are recorded.</text:p>
      <text:p text:style-name="Text_20_body"><text:span text:style-name="T1">11.5.2 </text:span>The final regression suite passes.</text:p>
      <text:p text:style-name="Text_20_body"><text:span text:style-name="T1">11.5.3 </text:span>The as-built document and any required specification amendments are complete.</text:p>
      <text:p text:style-name="Text_20_body"><text:span text:style-name="T1">11.5.4 </text:span>The project records one of the following explicit outcomes: viable for further study, viable only at weak compression, inconclusive, or not viable under the tested design.</text:p>
      <text:h text:style-name="Heading_20_2" text:outline-level="2"><text:bookmark-start text:name="stop-conditions-6"/>11.6 Stop conditions<text:bookmark-end text:name="stop-conditions-6"/></text:h>
      <text:p text:style-name="First_20_paragraph"><text:span text:style-name="T1">11.6.1 </text:span>Stop the pilot if non-finite loss, recurrent checkpoint corruption, reproducible DDP divergence, or invalid comparison controls occur.</text:p>
      <text:p text:style-name="Text_20_body"><text:span text:style-name="T1">11.6.2 </text:span>Stop expansion of the sweep if the principal model is operationally unstable and the failure is not attributable to row capacity.</text:p>
      <text:p text:style-name="Text_20_body"><text:span text:style-name="T1">11.6.3 </text:span>Stop architectural expansion after the agreed Q sweep and produce a written conclusion before introducing a successor design.</text:p>
      <text:h text:style-name="Heading_20_1" text:outline-level="1"><text:bookmark-start text:name="cross-stage-test-and-evidence-rules"/>12. Cross-stage test and evidence rules<text:bookmark-end text:name="cross-stage-test-and-evidence-rules"/></text:h>
      <text:p text:style-name="First_20_paragraph"><text:span text:style-name="T1">12.1 </text:span>Every stage shall add the tests required to prove its own new capability.</text:p>
      <text:p text:style-name="Text_20_body"><text:span text:style-name="T1">12.2 </text:span>Every stage shall run all earlier-stage tests unless the Test Plan defines a justified narrower pre-merge subset followed by full CI.</text:p>
      <text:p text:style-name="Text_20_body"><text:span text:style-name="T1">12.3 </text:span>Tests shall distinguish mathematical unit tests, CPU model tests, single-GPU tests, DDP tests, source guards, and scientific runs.</text:p>
      <text:p text:style-name="Text_20_body"><text:span text:style-name="T1">12.4 </text:span>A scientific run shall not substitute for a deterministic correctness test.</text:p>
      <text:p text:style-name="Text_20_body"><text:span text:style-name="T1">12.5 </text:span>Test outputs shall identify the exact commit, branch, command, environment, model geometry, seed, and result.</text:p>
      <text:p text:style-name="Text_20_body"><text:span text:style-name="T1">12.6 </text:span>Large logs and checkpoints shall remain outside Git unless selected as small fixtures.</text:p>
      <text:p text:style-name="Text_20_body"><text:span text:style-name="T1">12.7 </text:span>Each stage pull request shall include an evidence table of the following form.</text:p>
      <table:table table:name="Table3" table:style-name="Table3">
        <table:table-column table:style-name="Table3.A"/>
        <table:table-column table:style-name="Table3.B"/>
        <table:table-column table:style-name="Table3.C"/>
        <table:table-row>
          <table:table-cell table:style-name="TableRowCell" office:value-type="string">
            <text:p text:style-name="Table_20_Contents"><text:span text:style-name="T1">Evidence class</text:span></text:p>
          </table:table-cell>
          <table:table-cell table:style-name="TableRowCell" office:value-type="string">
            <text:p text:style-name="Table_20_Contents"><text:span text:style-name="T1">Minimum record</text:span></text:p>
          </table:table-cell>
          <table:table-cell table:style-name="TableRowCell" office:value-type="string">
            <text:p text:style-name="Table_20_Contents"><text:span text:style-name="T1">Acceptance decision</text:span></text:p>
          </table:table-cell>
        </table:table-row>
        <table:table-row>
          <table:table-cell table:style-name="TableRowCell" office:value-type="string">
            <text:p text:style-name="Table_20_Contents">Unit and integration tests</text:p>
          </table:table-cell>
          <table:table-cell table:style-name="TableRowCell" office:value-type="string">
            <text:p text:style-name="Table_20_Contents">Command, pass count, skipped count, failures, runtime.</text:p>
          </table:table-cell>
          <table:table-cell table:style-name="TableRowCell" office:value-type="string">
            <text:p text:style-name="Table_20_Contents">All mandatory tests pass.</text:p>
          </table:table-cell>
        </table:table-row>
        <table:table-row>
          <table:table-cell table:style-name="TableRowCell" office:value-type="string">
            <text:p text:style-name="Table_20_Contents">GPU or DDP smoke</text:p>
          </table:table-cell>
          <table:table-cell table:style-name="TableRowCell" office:value-type="string">
            <text:p text:style-name="Table_20_Contents">Hardware, launch command, geometry, updates, peak memory, outcome.</text:p>
          </table:table-cell>
          <table:table-cell table:style-name="TableRowCell" office:value-type="string">
            <text:p text:style-name="Table_20_Contents">Completes without architecture-attributable fault.</text:p>
          </table:table-cell>
        </table:table-row>
        <table:table-row>
          <table:table-cell table:style-name="TableRowCell" office:value-type="string">
            <text:p text:style-name="Table_20_Contents">State and checkpoint evidence</text:p>
          </table:table-cell>
          <table:table-cell table:style-name="TableRowCell" office:value-type="string">
            <text:p text:style-name="Table_20_Contents">State keys/counts, round-trip or resume comparison.</text:p>
          </table:table-cell>
          <table:table-cell table:style-name="TableRowCell" office:value-type="string">
            <text:p text:style-name="Table_20_Contents">Compact state is complete and reproducible.</text:p>
          </table:table-cell>
        </table:table-row>
        <table:table-row>
          <table:table-cell table:style-name="TableRowCell" office:value-type="string">
            <text:p text:style-name="Table_20_Contents">Regression evidence</text:p>
          </table:table-cell>
          <table:table-cell table:style-name="TableRowCell" office:value-type="string">
            <text:p text:style-name="Table_20_Contents">Dense commands and comparison tolerance.</text:p>
          </table:table-cell>
          <table:table-cell table:style-name="TableRowCell" office:value-type="string">
            <text:p text:style-name="Table_20_Contents">Dense behavior remains accepted.</text:p>
          </table:table-cell>
        </table:table-row>
        <table:table-row>
          <table:table-cell table:style-name="TableRowCell" office:value-type="string">
            <text:p text:style-name="Table_20_Contents">Scientific evidence</text:p>
          </table:table-cell>
          <table:table-cell table:style-name="TableRowCell" office:value-type="string">
            <text:p text:style-name="Table_20_Contents">Controlled configuration and measured metrics.</text:p>
          </table:table-cell>
          <table:table-cell table:style-name="TableRowCell" office:value-type="string">
            <text:p text:style-name="Table_20_Contents">Used only in Stage 6 decisions.</text:p>
          </table:table-cell>
        </table:table-row>
      </table:table>
      <text:h text:style-name="Heading_20_1" text:outline-level="1"><text:bookmark-start text:name="change-control-and-recovery"/>13. Change control and recovery<text:bookmark-end text:name="change-control-and-recovery"/></text:h>
      <text:p text:style-name="First_20_paragraph"><text:span text:style-name="T1">13.1 </text:span>A failed stage gate shall be corrected on the same stage branch before merge unless the stage is abandoned.</text:p>
      <text:p text:style-name="Text_20_body"><text:span text:style-name="T1">13.2 </text:span>A merged regression discovered later shall be fixed before dependent stage work continues.</text:p>
      <text:p text:style-name="Text_20_body"><text:span text:style-name="T1">13.3 </text:span>If the default branch becomes non-functional, the preferred recovery shall be a corrective pull request or revert to the last accepted stage commit, not unrecorded local repair.</text:p>
      <text:p text:style-name="Text_20_body"><text:span text:style-name="T1">13.4 </text:span>Any change to the fixed horizontal coordinate, independent row-sheet design, sole cross-entropy objective, or bivariate Chebyshev architecture shall require a requirements amendment.</text:p>
      <text:p text:style-name="Text_20_body"><text:span text:style-name="T1">13.5 </text:span>Any change to stage boundaries, stage ordering, or merge strategy shall require a staging-plan amendment.</text:p>
      <text:p text:style-name="Text_20_body"><text:span text:style-name="T1">13.6 </text:span>A mathematically equivalent basis-stabilization change may be handled through an implementation-plan amendment if the represented span and checkpoint semantics remain unchanged.</text:p>
      <text:p text:style-name="Text_20_body"><text:span text:style-name="T1">13.7 </text:span>Custom kernels, fused materialisation, or compilation-specific paths shall not be introduced before Stage 5 profiling demonstrates a material need.</text:p>
      <text:p text:style-name="Text_20_body"><text:span text:style-name="T1">13.8 </text:span>The tested reference implementation shall remain available until any optimized path has equivalent coverage.</text:p>
      <text:h text:style-name="Heading_20_1" text:outline-level="1"><text:bookmark-start text:name="stage-completion-reports"/>14. Stage completion reports<text:bookmark-end text:name="stage-completion-reports"/></text:h>
      <text:p text:style-name="First_20_paragraph"><text:span text:style-name="T1">14.1 </text:span>Each stage completion report shall state the accepted commit and pull-request number.</text:p>
      <text:p text:style-name="Text_20_body"><text:span text:style-name="T1">14.2 </text:span>Each report shall list files added, files modified, and any original nanoGPT lines superseded but retained as comments.</text:p>
      <text:p text:style-name="Text_20_body"><text:span text:style-name="T1">14.3 </text:span>Each report shall identify every configuration control added or changed.</text:p>
      <text:p text:style-name="Text_20_body"><text:span text:style-name="T1">14.4 </text:span>Each report shall list tests run and provide exact outcomes.</text:p>
      <text:p text:style-name="Text_20_body"><text:span text:style-name="T1">14.5 </text:span>Each report shall state which exit gates were satisfied and which stop conditions were considered.</text:p>
      <text:p text:style-name="Text_20_body"><text:span text:style-name="T1">14.6 </text:span>Each report shall identify deviations from the requirements specification, implementation plan, Test Plan, or this staging plan.</text:p>
      <text:p text:style-name="Text_20_body"><text:span text:style-name="T1">14.7 </text:span>Each report shall state what is intentionally deferred to the next stage.</text:p>
      <text:p text:style-name="Text_20_body"><text:span text:style-name="T1">14.8 </text:span>No report shall claim work from a later stage merely because partial scaffolding exists.</text:p>
      <text:h text:style-name="Heading_20_1" text:outline-level="1"><text:bookmark-start text:name="overall-completion-criteria"/>15. Overall completion criteria<text:bookmark-end text:name="overall-completion-criteria"/></text:h>
      <text:p text:style-name="First_20_paragraph"><text:span text:style-name="T1">15.1 </text:span>The initial Chebyshev Sheet implementation shall be considered complete only after Stage 6 acceptance.</text:p>
      <text:p text:style-name="Text_20_body"><text:span text:style-name="T1">15.2 </text:span>Completion shall require a preserved dense path, compact sheet state, reference and checkpointed execution, training, checkpoint save/resume, direct compact inference, DDP, target-geometry evidence, complete regression success, and as-built documentation.</text:p>
      <text:p text:style-name="Text_20_body"><text:span text:style-name="T1">15.3 </text:span>Completion shall not imply that the architecture matches or exceeds dense nanoGPT quality.</text:p>
      <text:p text:style-name="Text_20_body"><text:span text:style-name="T1">15.4 </text:span>A scientifically negative Stage 6 outcome may still accompany a functionally complete implementation.</text:p>
      <text:p text:style-name="Text_20_body"><text:span text:style-name="T1">15.5 </text:span>Further architectures, including learned horizontal geometry or three-dimensional Chebyshev fields, shall be treated as successor work rather than hidden extensions of this staging plan.</text:p>
      <text:h text:style-name="Heading_20_1" text:outline-level="1"><text:bookmark-start text:name="immediate-next-actions"/>16. Immediate next actions<text:bookmark-end text:name="immediate-next-actions"/></text:h>
      <text:p text:style-name="First_20_paragraph"><text:span text:style-name="T1">16.1 </text:span>Complete the current Vermeer enhancement without interaction from thog2 work.</text:p>
      <text:p text:style-name="Text_20_body"><text:span text:style-name="T1">16.2 </text:span>Create the thog2 GitHub repository as a fresh nanoGPT clone.</text:p>
      <text:p text:style-name="Text_20_body"><text:span text:style-name="T1">16.3 </text:span>Provide repository access and identify the intended upstream baseline commit if it differs from the repository default.</text:p>
      <text:p text:style-name="Text_20_body"><text:span text:style-name="T1">16.4 </text:span>Prepare the separate THOG2 Chebyshev Sheet Test Plan.</text:p>
      <text:p text:style-name="Text_20_body"><text:span text:style-name="T1">16.5 </text:span>Add the requirements specification, implementation plan, staging plan, and Test Plan in Stage 0.</text:p>
      <text:p text:style-name="Text_20_body"><text:span text:style-name="T1">16.6 </text:span>Do not commence Stage 1 until Stage 0 is merged and the dense baseline evidence is accep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7-02T01:12:41Z</meta:creation-date>
    <dc:date>2026-07-02T01:12:41Z</dc:date>
  </office:meta>
</office:document-meta>
</file>